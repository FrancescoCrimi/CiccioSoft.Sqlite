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33cm"/>
    </style:style>
    <style:style style:name="co4" style:family="table-column">
      <style:table-column-properties fo:break-before="auto" style:column-width="7.997cm"/>
    </style:style>
    <style:style style:name="co5" style:family="table-column">
      <style:table-column-properties fo:break-before="auto" style:column-width="6.7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qlite3_libversion</text:p>
          </table:table-cell>
          <table:table-cell table:number-columns-repeated="2"/>
          <table:table-cell office:value-type="string" calcext:value-type="string">
            <text:p>sqlite3_libversion</text:p>
          </table:table-cell>
          <table:table-cell table:formula="of:=IFERROR(VLOOKUP([.A1]; [.$D$1:.$D$63]; 1; 0); &quot;&quot;)" office:value-type="string" office:string-value="sqlite3_libversion" calcext:value-type="string">
            <text:p>sqlite3_libversion</text:p>
          </table:table-cell>
          <table:table-cell table:formula="of:=IF(ISERROR(MATCH([.A1]; [.$D$1:.$D$63]; 0)); [.A1]; &quot;&quot;)">
            <text:p/>
          </table:table-cell>
        </table:table-row>
        <table:table-row table:style-name="ro1">
          <table:table-cell office:value-type="string" calcext:value-type="string">
            <text:p>sqlite3_sourceid</text:p>
          </table:table-cell>
          <table:table-cell table:number-columns-repeated="2"/>
          <table:table-cell office:value-type="string" calcext:value-type="string">
            <text:p>sqlite3_libversion_number</text:p>
          </table:table-cell>
          <table:table-cell table:formula="of:=IFERROR(VLOOKUP([.A2]; [.$D$1:.$D$63]; 1; 0); &quot;&quot;)">
            <text:p/>
          </table:table-cell>
          <table:table-cell table:formula="of:=IF(ISERROR(MATCH([.A2]; [.$D$1:.$D$63]; 0)); [.A2]; &quot;&quot;)" office:value-type="string" office:string-value="sqlite3_sourceid" calcext:value-type="string">
            <text:p>sqlite3_sourceid</text:p>
          </table:table-cell>
        </table:table-row>
        <table:table-row table:style-name="ro1">
          <table:table-cell office:value-type="string" calcext:value-type="string">
            <text:p>sqlite3_libversion_number</text:p>
          </table:table-cell>
          <table:table-cell table:number-columns-repeated="2"/>
          <table:table-cell office:value-type="string" calcext:value-type="string">
            <text:p>sqlite3_close_v2</text:p>
          </table:table-cell>
          <table:table-cell table:formula="of:=IFERROR(VLOOKUP([.A3]; [.$D$1:.$D$63]; 1; 0); &quot;&quot;)" office:value-type="string" office:string-value="sqlite3_libversion_number" calcext:value-type="string">
            <text:p>sqlite3_libversion_number</text:p>
          </table:table-cell>
          <table:table-cell table:formula="of:=IF(ISERROR(MATCH([.A3]; [.$D$1:.$D$63]; 0)); [.A3]; &quot;&quot;)">
            <text:p/>
          </table:table-cell>
        </table:table-row>
        <table:table-row table:style-name="ro1">
          <table:table-cell office:value-type="string" calcext:value-type="string">
            <text:p>sqlite3_compileoption_used</text:p>
          </table:table-cell>
          <table:table-cell table:number-columns-repeated="2"/>
          <table:table-cell office:value-type="string" calcext:value-type="string">
            <text:p>sqlite3_exec</text:p>
          </table:table-cell>
          <table:table-cell table:formula="of:=IFERROR(VLOOKUP([.A4]; [.$D$1:.$D$63]; 1; 0); &quot;&quot;)">
            <text:p/>
          </table:table-cell>
          <table:table-cell table:formula="of:=IF(ISERROR(MATCH([.A4]; [.$D$1:.$D$63]; 0)); [.A4]; &quot;&quot;)" office:value-type="string" office:string-value="sqlite3_compileoption_used" calcext:value-type="string">
            <text:p>sqlite3_compileoption_used</text:p>
          </table:table-cell>
        </table:table-row>
        <table:table-row table:style-name="ro1">
          <table:table-cell office:value-type="string" calcext:value-type="string">
            <text:p>sqlite3_compileoption_get</text:p>
          </table:table-cell>
          <table:table-cell table:number-columns-repeated="2"/>
          <table:table-cell office:value-type="string" calcext:value-type="string">
            <text:p>sqlite3_extended_result_codes</text:p>
          </table:table-cell>
          <table:table-cell table:formula="of:=IFERROR(VLOOKUP([.A5]; [.$D$1:.$D$63]; 1; 0); &quot;&quot;)">
            <text:p/>
          </table:table-cell>
          <table:table-cell table:formula="of:=IF(ISERROR(MATCH([.A5]; [.$D$1:.$D$63]; 0)); [.A5]; &quot;&quot;)" office:value-type="string" office:string-value="sqlite3_compileoption_get" calcext:value-type="string">
            <text:p>sqlite3_compileoption_get</text:p>
          </table:table-cell>
        </table:table-row>
        <table:table-row table:style-name="ro1">
          <table:table-cell office:value-type="string" calcext:value-type="string">
            <text:p>sqlite3_threadsafe</text:p>
          </table:table-cell>
          <table:table-cell table:number-columns-repeated="2"/>
          <table:table-cell office:value-type="string" calcext:value-type="string">
            <text:p>sqlite3_last_insert_rowid</text:p>
          </table:table-cell>
          <table:table-cell table:formula="of:=IFERROR(VLOOKUP([.A6]; [.$D$1:.$D$63]; 1; 0); &quot;&quot;)">
            <text:p/>
          </table:table-cell>
          <table:table-cell table:formula="of:=IF(ISERROR(MATCH([.A6]; [.$D$1:.$D$63]; 0)); [.A6]; &quot;&quot;)" office:value-type="string" office:string-value="sqlite3_threadsafe" calcext:value-type="string">
            <text:p>sqlite3_threadsafe</text:p>
          </table:table-cell>
        </table:table-row>
        <table:table-row table:style-name="ro1">
          <table:table-cell office:value-type="string" calcext:value-type="string">
            <text:p>sqlite3_close</text:p>
          </table:table-cell>
          <table:table-cell table:number-columns-repeated="2"/>
          <table:table-cell office:value-type="string" calcext:value-type="string">
            <text:p>sqlite3_changes</text:p>
          </table:table-cell>
          <table:table-cell table:formula="of:=IFERROR(VLOOKUP([.A7]; [.$D$1:.$D$63]; 1; 0); &quot;&quot;)">
            <text:p/>
          </table:table-cell>
          <table:table-cell table:formula="of:=IF(ISERROR(MATCH([.A7]; [.$D$1:.$D$63]; 0)); [.A7]; &quot;&quot;)" office:value-type="string" office:string-value="sqlite3_close" calcext:value-type="string">
            <text:p>sqlite3_close</text:p>
          </table:table-cell>
        </table:table-row>
        <table:table-row table:style-name="ro1">
          <table:table-cell office:value-type="string" calcext:value-type="string">
            <text:p>sqlite3_close_v2</text:p>
          </table:table-cell>
          <table:table-cell table:number-columns-repeated="2"/>
          <table:table-cell office:value-type="string" calcext:value-type="string">
            <text:p>sqlite3_changes64</text:p>
          </table:table-cell>
          <table:table-cell table:formula="of:=IFERROR(VLOOKUP([.A8]; [.$D$1:.$D$63]; 1; 0); &quot;&quot;)" office:value-type="string" office:string-value="sqlite3_close_v2" calcext:value-type="string">
            <text:p>sqlite3_close_v2</text:p>
          </table:table-cell>
          <table:table-cell table:formula="of:=IF(ISERROR(MATCH([.A8]; [.$D$1:.$D$63]; 0)); [.A8]; &quot;&quot;)">
            <text:p/>
          </table:table-cell>
        </table:table-row>
        <table:table-row table:style-name="ro1">
          <table:table-cell office:value-type="string" calcext:value-type="string">
            <text:p>sqlite3_exec</text:p>
          </table:table-cell>
          <table:table-cell table:number-columns-repeated="2"/>
          <table:table-cell office:value-type="string" calcext:value-type="string">
            <text:p>sqlite3_total_changes</text:p>
          </table:table-cell>
          <table:table-cell table:formula="of:=IFERROR(VLOOKUP([.A9]; [.$D$1:.$D$63]; 1; 0); &quot;&quot;)" office:value-type="string" office:string-value="sqlite3_exec" calcext:value-type="string">
            <text:p>sqlite3_exec</text:p>
          </table:table-cell>
          <table:table-cell table:formula="of:=IF(ISERROR(MATCH([.A9]; [.$D$1:.$D$63]; 0)); [.A9]; &quot;&quot;)">
            <text:p/>
          </table:table-cell>
        </table:table-row>
        <table:table-row table:style-name="ro1">
          <table:table-cell office:value-type="string" calcext:value-type="string">
            <text:p>sqlite3_initialize</text:p>
          </table:table-cell>
          <table:table-cell table:number-columns-repeated="2"/>
          <table:table-cell office:value-type="string" calcext:value-type="string">
            <text:p>sqlite3_total_changes64</text:p>
          </table:table-cell>
          <table:table-cell table:formula="of:=IFERROR(VLOOKUP([.A10]; [.$D$1:.$D$63]; 1; 0); &quot;&quot;)">
            <text:p/>
          </table:table-cell>
          <table:table-cell table:formula="of:=IF(ISERROR(MATCH([.A10]; [.$D$1:.$D$63]; 0)); [.A10]; &quot;&quot;)" office:value-type="string" office:string-value="sqlite3_initialize" calcext:value-type="string">
            <text:p>sqlite3_initialize</text:p>
          </table:table-cell>
        </table:table-row>
        <table:table-row table:style-name="ro1">
          <table:table-cell office:value-type="string" calcext:value-type="string">
            <text:p>sqlite3_shutdown</text:p>
          </table:table-cell>
          <table:table-cell table:number-columns-repeated="2"/>
          <table:table-cell office:value-type="string" calcext:value-type="string">
            <text:p>sqlite3_interrupt</text:p>
          </table:table-cell>
          <table:table-cell table:formula="of:=IFERROR(VLOOKUP([.A11]; [.$D$1:.$D$63]; 1; 0); &quot;&quot;)">
            <text:p/>
          </table:table-cell>
          <table:table-cell table:formula="of:=IF(ISERROR(MATCH([.A11]; [.$D$1:.$D$63]; 0)); [.A11]; &quot;&quot;)" office:value-type="string" office:string-value="sqlite3_shutdown" calcext:value-type="string">
            <text:p>sqlite3_shutdown</text:p>
          </table:table-cell>
        </table:table-row>
        <table:table-row table:style-name="ro1">
          <table:table-cell office:value-type="string" calcext:value-type="string">
            <text:p>sqlite3_os_init</text:p>
          </table:table-cell>
          <table:table-cell table:number-columns-repeated="2"/>
          <table:table-cell office:value-type="string" calcext:value-type="string">
            <text:p>sqlite3_is_interrupted</text:p>
          </table:table-cell>
          <table:table-cell table:formula="of:=IFERROR(VLOOKUP([.A12]; [.$D$1:.$D$63]; 1; 0); &quot;&quot;)">
            <text:p/>
          </table:table-cell>
          <table:table-cell table:formula="of:=IF(ISERROR(MATCH([.A12]; [.$D$1:.$D$63]; 0)); [.A12]; &quot;&quot;)" office:value-type="string" office:string-value="sqlite3_os_init" calcext:value-type="string">
            <text:p>sqlite3_os_init</text:p>
          </table:table-cell>
        </table:table-row>
        <table:table-row table:style-name="ro1">
          <table:table-cell office:value-type="string" calcext:value-type="string">
            <text:p>sqlite3_os_end</text:p>
          </table:table-cell>
          <table:table-cell table:number-columns-repeated="2"/>
          <table:table-cell office:value-type="string" calcext:value-type="string">
            <text:p>sqlite3_busy_timeout</text:p>
          </table:table-cell>
          <table:table-cell table:formula="of:=IFERROR(VLOOKUP([.A13]; [.$D$1:.$D$63]; 1; 0); &quot;&quot;)">
            <text:p/>
          </table:table-cell>
          <table:table-cell table:formula="of:=IF(ISERROR(MATCH([.A13]; [.$D$1:.$D$63]; 0)); [.A13]; &quot;&quot;)" office:value-type="string" office:string-value="sqlite3_os_end" calcext:value-type="string">
            <text:p>sqlite3_os_end</text:p>
          </table:table-cell>
        </table:table-row>
        <table:table-row table:style-name="ro1">
          <table:table-cell office:value-type="string" calcext:value-type="string">
            <text:p>sqlite3_config</text:p>
          </table:table-cell>
          <table:table-cell table:number-columns-repeated="2"/>
          <table:table-cell office:value-type="string" calcext:value-type="string">
            <text:p>sqlite3_free</text:p>
          </table:table-cell>
          <table:table-cell table:formula="of:=IFERROR(VLOOKUP([.A14]; [.$D$1:.$D$63]; 1; 0); &quot;&quot;)">
            <text:p/>
          </table:table-cell>
          <table:table-cell table:formula="of:=IF(ISERROR(MATCH([.A14]; [.$D$1:.$D$63]; 0)); [.A14]; &quot;&quot;)" office:value-type="string" office:string-value="sqlite3_config" calcext:value-type="string">
            <text:p>sqlite3_config</text:p>
          </table:table-cell>
        </table:table-row>
        <table:table-row table:style-name="ro1">
          <table:table-cell office:value-type="string" calcext:value-type="string">
            <text:p>sqlite3_db_config</text:p>
          </table:table-cell>
          <table:table-cell table:number-columns-repeated="2"/>
          <table:table-cell office:value-type="string" calcext:value-type="string">
            <text:p>sqlite3_open_v2</text:p>
          </table:table-cell>
          <table:table-cell table:formula="of:=IFERROR(VLOOKUP([.A15]; [.$D$1:.$D$63]; 1; 0); &quot;&quot;)">
            <text:p/>
          </table:table-cell>
          <table:table-cell table:formula="of:=IF(ISERROR(MATCH([.A15]; [.$D$1:.$D$63]; 0)); [.A15]; &quot;&quot;)" office:value-type="string" office:string-value="sqlite3_db_config" calcext:value-type="string">
            <text:p>sqlite3_db_config</text:p>
          </table:table-cell>
        </table:table-row>
        <table:table-row table:style-name="ro1">
          <table:table-cell office:value-type="string" calcext:value-type="string">
            <text:p>sqlite3_extended_result_codes</text:p>
          </table:table-cell>
          <table:table-cell table:number-columns-repeated="2"/>
          <table:table-cell office:value-type="string" calcext:value-type="string">
            <text:p>sqlite3_errcode</text:p>
          </table:table-cell>
          <table:table-cell table:formula="of:=IFERROR(VLOOKUP([.A16]; [.$D$1:.$D$63]; 1; 0); &quot;&quot;)" office:value-type="string" office:string-value="sqlite3_extended_result_codes" calcext:value-type="string">
            <text:p>sqlite3_extended_result_codes</text:p>
          </table:table-cell>
          <table:table-cell table:formula="of:=IF(ISERROR(MATCH([.A16]; [.$D$1:.$D$63]; 0)); [.A16]; &quot;&quot;)">
            <text:p/>
          </table:table-cell>
        </table:table-row>
        <table:table-row table:style-name="ro1">
          <table:table-cell office:value-type="string" calcext:value-type="string">
            <text:p>sqlite3_last_insert_rowid</text:p>
          </table:table-cell>
          <table:table-cell table:number-columns-repeated="2"/>
          <table:table-cell office:value-type="string" calcext:value-type="string">
            <text:p>sqlite3_extended_errcode</text:p>
          </table:table-cell>
          <table:table-cell table:formula="of:=IFERROR(VLOOKUP([.A17]; [.$D$1:.$D$63]; 1; 0); &quot;&quot;)" office:value-type="string" office:string-value="sqlite3_last_insert_rowid" calcext:value-type="string">
            <text:p>sqlite3_last_insert_rowid</text:p>
          </table:table-cell>
          <table:table-cell table:formula="of:=IF(ISERROR(MATCH([.A17]; [.$D$1:.$D$63]; 0)); [.A17]; &quot;&quot;)">
            <text:p/>
          </table:table-cell>
        </table:table-row>
        <table:table-row table:style-name="ro1">
          <table:table-cell office:value-type="string" calcext:value-type="string">
            <text:p>sqlite3_set_last_insert_rowid</text:p>
          </table:table-cell>
          <table:table-cell table:number-columns-repeated="2"/>
          <table:table-cell office:value-type="string" calcext:value-type="string">
            <text:p>sqlite3_errmsg</text:p>
          </table:table-cell>
          <table:table-cell table:formula="of:=IFERROR(VLOOKUP([.A18]; [.$D$1:.$D$63]; 1; 0); &quot;&quot;)">
            <text:p/>
          </table:table-cell>
          <table:table-cell table:formula="of:=IF(ISERROR(MATCH([.A18]; [.$D$1:.$D$63]; 0)); [.A18]; &quot;&quot;)" office:value-type="string" office:string-value="sqlite3_set_last_insert_rowid" calcext:value-type="string">
            <text:p>sqlite3_set_last_insert_rowid</text:p>
          </table:table-cell>
        </table:table-row>
        <table:table-row table:style-name="ro1">
          <table:table-cell office:value-type="string" calcext:value-type="string">
            <text:p>sqlite3_changes</text:p>
          </table:table-cell>
          <table:table-cell table:number-columns-repeated="2"/>
          <table:table-cell office:value-type="string" calcext:value-type="string">
            <text:p>sqlite3_errstr</text:p>
          </table:table-cell>
          <table:table-cell table:formula="of:=IFERROR(VLOOKUP([.A19]; [.$D$1:.$D$63]; 1; 0); &quot;&quot;)" office:value-type="string" office:string-value="sqlite3_changes" calcext:value-type="string">
            <text:p>sqlite3_changes</text:p>
          </table:table-cell>
          <table:table-cell table:formula="of:=IF(ISERROR(MATCH([.A19]; [.$D$1:.$D$63]; 0)); [.A19]; &quot;&quot;)">
            <text:p/>
          </table:table-cell>
        </table:table-row>
        <table:table-row table:style-name="ro1">
          <table:table-cell office:value-type="string" calcext:value-type="string">
            <text:p>sqlite3_changes64</text:p>
          </table:table-cell>
          <table:table-cell table:number-columns-repeated="2"/>
          <table:table-cell office:value-type="string" calcext:value-type="string">
            <text:p>sqlite3_error_offset</text:p>
          </table:table-cell>
          <table:table-cell table:formula="of:=IFERROR(VLOOKUP([.A20]; [.$D$1:.$D$63]; 1; 0); &quot;&quot;)" office:value-type="string" office:string-value="sqlite3_changes64" calcext:value-type="string">
            <text:p>sqlite3_changes64</text:p>
          </table:table-cell>
          <table:table-cell table:formula="of:=IF(ISERROR(MATCH([.A20]; [.$D$1:.$D$63]; 0)); [.A20]; &quot;&quot;)">
            <text:p/>
          </table:table-cell>
        </table:table-row>
        <table:table-row table:style-name="ro1">
          <table:table-cell office:value-type="string" calcext:value-type="string">
            <text:p>sqlite3_total_changes</text:p>
          </table:table-cell>
          <table:table-cell table:number-columns-repeated="2"/>
          <table:table-cell office:value-type="string" calcext:value-type="string">
            <text:p>sqlite3_limit</text:p>
          </table:table-cell>
          <table:table-cell table:formula="of:=IFERROR(VLOOKUP([.A21]; [.$D$1:.$D$63]; 1; 0); &quot;&quot;)" office:value-type="string" office:string-value="sqlite3_total_changes" calcext:value-type="string">
            <text:p>sqlite3_total_changes</text:p>
          </table:table-cell>
          <table:table-cell table:formula="of:=IF(ISERROR(MATCH([.A21]; [.$D$1:.$D$63]; 0)); [.A21]; &quot;&quot;)">
            <text:p/>
          </table:table-cell>
        </table:table-row>
        <table:table-row table:style-name="ro1">
          <table:table-cell office:value-type="string" calcext:value-type="string">
            <text:p>sqlite3_total_changes64</text:p>
          </table:table-cell>
          <table:table-cell table:number-columns-repeated="2"/>
          <table:table-cell office:value-type="string" calcext:value-type="string">
            <text:p>sqlite3_prepare_v3</text:p>
          </table:table-cell>
          <table:table-cell table:formula="of:=IFERROR(VLOOKUP([.A22]; [.$D$1:.$D$63]; 1; 0); &quot;&quot;)" office:value-type="string" office:string-value="sqlite3_total_changes64" calcext:value-type="string">
            <text:p>sqlite3_total_changes64</text:p>
          </table:table-cell>
          <table:table-cell table:formula="of:=IF(ISERROR(MATCH([.A22]; [.$D$1:.$D$63]; 0)); [.A22]; &quot;&quot;)">
            <text:p/>
          </table:table-cell>
        </table:table-row>
        <table:table-row table:style-name="ro1">
          <table:table-cell office:value-type="string" calcext:value-type="string">
            <text:p>sqlite3_interrupt</text:p>
          </table:table-cell>
          <table:table-cell table:number-columns-repeated="2"/>
          <table:table-cell office:value-type="string" calcext:value-type="string">
            <text:p>sqlite3_sql</text:p>
          </table:table-cell>
          <table:table-cell table:formula="of:=IFERROR(VLOOKUP([.A23]; [.$D$1:.$D$63]; 1; 0); &quot;&quot;)" office:value-type="string" office:string-value="sqlite3_interrupt" calcext:value-type="string">
            <text:p>sqlite3_interrupt</text:p>
          </table:table-cell>
          <table:table-cell table:formula="of:=IF(ISERROR(MATCH([.A23]; [.$D$1:.$D$63]; 0)); [.A23]; &quot;&quot;)">
            <text:p/>
          </table:table-cell>
        </table:table-row>
        <table:table-row table:style-name="ro1">
          <table:table-cell office:value-type="string" calcext:value-type="string">
            <text:p>sqlite3_is_interrupted</text:p>
          </table:table-cell>
          <table:table-cell table:number-columns-repeated="2"/>
          <table:table-cell office:value-type="string" calcext:value-type="string">
            <text:p>sqlite3_expanded_sql</text:p>
          </table:table-cell>
          <table:table-cell table:formula="of:=IFERROR(VLOOKUP([.A24]; [.$D$1:.$D$63]; 1; 0); &quot;&quot;)" office:value-type="string" office:string-value="sqlite3_is_interrupted" calcext:value-type="string">
            <text:p>sqlite3_is_interrupted</text:p>
          </table:table-cell>
          <table:table-cell table:formula="of:=IF(ISERROR(MATCH([.A24]; [.$D$1:.$D$63]; 0)); [.A24]; &quot;&quot;)">
            <text:p/>
          </table:table-cell>
        </table:table-row>
        <table:table-row table:style-name="ro1">
          <table:table-cell office:value-type="string" calcext:value-type="string">
            <text:p>sqlite3_complete</text:p>
          </table:table-cell>
          <table:table-cell table:number-columns-repeated="2"/>
          <table:table-cell office:value-type="string" calcext:value-type="string">
            <text:p>sqlite3_stmt_readonly</text:p>
          </table:table-cell>
          <table:table-cell table:formula="of:=IFERROR(VLOOKUP([.A25]; [.$D$1:.$D$63]; 1; 0); &quot;&quot;)">
            <text:p/>
          </table:table-cell>
          <table:table-cell table:formula="of:=IF(ISERROR(MATCH([.A25]; [.$D$1:.$D$63]; 0)); [.A25]; &quot;&quot;)" office:value-type="string" office:string-value="sqlite3_complete" calcext:value-type="string">
            <text:p>sqlite3_complete</text:p>
          </table:table-cell>
        </table:table-row>
        <table:table-row table:style-name="ro1">
          <table:table-cell office:value-type="string" calcext:value-type="string">
            <text:p>sqlite3_complete16</text:p>
          </table:table-cell>
          <table:table-cell table:number-columns-repeated="2"/>
          <table:table-cell office:value-type="string" calcext:value-type="string">
            <text:p>sqlite3_stmt_busy</text:p>
          </table:table-cell>
          <table:table-cell table:formula="of:=IFERROR(VLOOKUP([.A26]; [.$D$1:.$D$63]; 1; 0); &quot;&quot;)">
            <text:p/>
          </table:table-cell>
          <table:table-cell table:formula="of:=IF(ISERROR(MATCH([.A26]; [.$D$1:.$D$63]; 0)); [.A26]; &quot;&quot;)" office:value-type="string" office:string-value="sqlite3_complete16" calcext:value-type="string">
            <text:p>sqlite3_complete16</text:p>
          </table:table-cell>
        </table:table-row>
        <table:table-row table:style-name="ro1">
          <table:table-cell office:value-type="string" calcext:value-type="string">
            <text:p>sqlite3_busy_handler</text:p>
          </table:table-cell>
          <table:table-cell table:number-columns-repeated="2"/>
          <table:table-cell office:value-type="string" calcext:value-type="string">
            <text:p>sqlite3_bind_blob</text:p>
          </table:table-cell>
          <table:table-cell table:formula="of:=IFERROR(VLOOKUP([.A27]; [.$D$1:.$D$63]; 1; 0); &quot;&quot;)">
            <text:p/>
          </table:table-cell>
          <table:table-cell table:formula="of:=IF(ISERROR(MATCH([.A27]; [.$D$1:.$D$63]; 0)); [.A27]; &quot;&quot;)" office:value-type="string" office:string-value="sqlite3_busy_handler" calcext:value-type="string">
            <text:p>sqlite3_busy_handler</text:p>
          </table:table-cell>
        </table:table-row>
        <table:table-row table:style-name="ro1">
          <table:table-cell office:value-type="string" calcext:value-type="string">
            <text:p>sqlite3_busy_timeout</text:p>
          </table:table-cell>
          <table:table-cell table:number-columns-repeated="2"/>
          <table:table-cell office:value-type="string" calcext:value-type="string">
            <text:p>sqlite3_bind_double</text:p>
          </table:table-cell>
          <table:table-cell table:formula="of:=IFERROR(VLOOKUP([.A28]; [.$D$1:.$D$63]; 1; 0); &quot;&quot;)" office:value-type="string" office:string-value="sqlite3_busy_timeout" calcext:value-type="string">
            <text:p>sqlite3_busy_timeout</text:p>
          </table:table-cell>
          <table:table-cell table:formula="of:=IF(ISERROR(MATCH([.A28]; [.$D$1:.$D$63]; 0)); [.A28]; &quot;&quot;)">
            <text:p/>
          </table:table-cell>
        </table:table-row>
        <table:table-row table:style-name="ro1">
          <table:table-cell office:value-type="string" calcext:value-type="string">
            <text:p>sqlite3_setlk_timeout</text:p>
          </table:table-cell>
          <table:table-cell table:number-columns-repeated="2"/>
          <table:table-cell office:value-type="string" calcext:value-type="string">
            <text:p>sqlite3_bind_int</text:p>
          </table:table-cell>
          <table:table-cell table:formula="of:=IFERROR(VLOOKUP([.A29]; [.$D$1:.$D$63]; 1; 0); &quot;&quot;)">
            <text:p/>
          </table:table-cell>
          <table:table-cell table:formula="of:=IF(ISERROR(MATCH([.A29]; [.$D$1:.$D$63]; 0)); [.A29]; &quot;&quot;)" office:value-type="string" office:string-value="sqlite3_setlk_timeout" calcext:value-type="string">
            <text:p>sqlite3_setlk_timeout</text:p>
          </table:table-cell>
        </table:table-row>
        <table:table-row table:style-name="ro1">
          <table:table-cell office:value-type="string" calcext:value-type="string">
            <text:p>sqlite3_get_table</text:p>
          </table:table-cell>
          <table:table-cell table:number-columns-repeated="2"/>
          <table:table-cell office:value-type="string" calcext:value-type="string">
            <text:p>sqlite3_bind_int64</text:p>
          </table:table-cell>
          <table:table-cell table:formula="of:=IFERROR(VLOOKUP([.A30]; [.$D$1:.$D$63]; 1; 0); &quot;&quot;)">
            <text:p/>
          </table:table-cell>
          <table:table-cell table:formula="of:=IF(ISERROR(MATCH([.A30]; [.$D$1:.$D$63]; 0)); [.A30]; &quot;&quot;)" office:value-type="string" office:string-value="sqlite3_get_table" calcext:value-type="string">
            <text:p>sqlite3_get_table</text:p>
          </table:table-cell>
        </table:table-row>
        <table:table-row table:style-name="ro1">
          <table:table-cell office:value-type="string" calcext:value-type="string">
            <text:p>sqlite3_free_table</text:p>
          </table:table-cell>
          <table:table-cell table:number-columns-repeated="2"/>
          <table:table-cell office:value-type="string" calcext:value-type="string">
            <text:p>sqlite3_bind_null</text:p>
          </table:table-cell>
          <table:table-cell table:formula="of:=IFERROR(VLOOKUP([.A31]; [.$D$1:.$D$63]; 1; 0); &quot;&quot;)">
            <text:p/>
          </table:table-cell>
          <table:table-cell table:formula="of:=IF(ISERROR(MATCH([.A31]; [.$D$1:.$D$63]; 0)); [.A31]; &quot;&quot;)" office:value-type="string" office:string-value="sqlite3_free_table" calcext:value-type="string">
            <text:p>sqlite3_free_table</text:p>
          </table:table-cell>
        </table:table-row>
        <table:table-row table:style-name="ro1">
          <table:table-cell office:value-type="string" calcext:value-type="string">
            <text:p>sqlite3_mprintf</text:p>
          </table:table-cell>
          <table:table-cell table:number-columns-repeated="2"/>
          <table:table-cell office:value-type="string" calcext:value-type="string">
            <text:p>sqlite3_bind_text</text:p>
          </table:table-cell>
          <table:table-cell table:formula="of:=IFERROR(VLOOKUP([.A32]; [.$D$1:.$D$63]; 1; 0); &quot;&quot;)">
            <text:p/>
          </table:table-cell>
          <table:table-cell table:formula="of:=IF(ISERROR(MATCH([.A32]; [.$D$1:.$D$63]; 0)); [.A32]; &quot;&quot;)" office:value-type="string" office:string-value="sqlite3_mprintf" calcext:value-type="string">
            <text:p>sqlite3_mprintf</text:p>
          </table:table-cell>
        </table:table-row>
        <table:table-row table:style-name="ro1">
          <table:table-cell office:value-type="string" calcext:value-type="string">
            <text:p>sqlite3_vmprintf</text:p>
          </table:table-cell>
          <table:table-cell table:number-columns-repeated="2"/>
          <table:table-cell office:value-type="string" calcext:value-type="string">
            <text:p>sqlite3_bind_value</text:p>
          </table:table-cell>
          <table:table-cell table:formula="of:=IFERROR(VLOOKUP([.A33]; [.$D$1:.$D$63]; 1; 0); &quot;&quot;)">
            <text:p/>
          </table:table-cell>
          <table:table-cell table:formula="of:=IF(ISERROR(MATCH([.A33]; [.$D$1:.$D$63]; 0)); [.A33]; &quot;&quot;)" office:value-type="string" office:string-value="sqlite3_vmprintf" calcext:value-type="string">
            <text:p>sqlite3_vmprintf</text:p>
          </table:table-cell>
        </table:table-row>
        <table:table-row table:style-name="ro1">
          <table:table-cell office:value-type="string" calcext:value-type="string">
            <text:p>sqlite3_snprintf</text:p>
          </table:table-cell>
          <table:table-cell table:number-columns-repeated="2"/>
          <table:table-cell office:value-type="string" calcext:value-type="string">
            <text:p>sqlite3_bind_parameter_count</text:p>
          </table:table-cell>
          <table:table-cell table:formula="of:=IFERROR(VLOOKUP([.A34]; [.$D$1:.$D$63]; 1; 0); &quot;&quot;)">
            <text:p/>
          </table:table-cell>
          <table:table-cell table:formula="of:=IF(ISERROR(MATCH([.A34]; [.$D$1:.$D$63]; 0)); [.A34]; &quot;&quot;)" office:value-type="string" office:string-value="sqlite3_snprintf" calcext:value-type="string">
            <text:p>sqlite3_snprintf</text:p>
          </table:table-cell>
        </table:table-row>
        <table:table-row table:style-name="ro1">
          <table:table-cell office:value-type="string" calcext:value-type="string">
            <text:p>sqlite3_vsnprintf</text:p>
          </table:table-cell>
          <table:table-cell table:number-columns-repeated="2"/>
          <table:table-cell office:value-type="string" calcext:value-type="string">
            <text:p>sqlite3_bind_parameter_name</text:p>
          </table:table-cell>
          <table:table-cell table:formula="of:=IFERROR(VLOOKUP([.A35]; [.$D$1:.$D$63]; 1; 0); &quot;&quot;)">
            <text:p/>
          </table:table-cell>
          <table:table-cell table:formula="of:=IF(ISERROR(MATCH([.A35]; [.$D$1:.$D$63]; 0)); [.A35]; &quot;&quot;)" office:value-type="string" office:string-value="sqlite3_vsnprintf" calcext:value-type="string">
            <text:p>sqlite3_vsnprintf</text:p>
          </table:table-cell>
        </table:table-row>
        <table:table-row table:style-name="ro1">
          <table:table-cell office:value-type="string" calcext:value-type="string">
            <text:p>sqlite3_malloc</text:p>
          </table:table-cell>
          <table:table-cell table:number-columns-repeated="2"/>
          <table:table-cell office:value-type="string" calcext:value-type="string">
            <text:p>sqlite3_bind_parameter_index</text:p>
          </table:table-cell>
          <table:table-cell table:formula="of:=IFERROR(VLOOKUP([.A36]; [.$D$1:.$D$63]; 1; 0); &quot;&quot;)">
            <text:p/>
          </table:table-cell>
          <table:table-cell table:formula="of:=IF(ISERROR(MATCH([.A36]; [.$D$1:.$D$63]; 0)); [.A36]; &quot;&quot;)" office:value-type="string" office:string-value="sqlite3_malloc" calcext:value-type="string">
            <text:p>sqlite3_malloc</text:p>
          </table:table-cell>
        </table:table-row>
        <table:table-row table:style-name="ro1">
          <table:table-cell office:value-type="string" calcext:value-type="string">
            <text:p>sqlite3_malloc64</text:p>
          </table:table-cell>
          <table:table-cell table:number-columns-repeated="2"/>
          <table:table-cell office:value-type="string" calcext:value-type="string">
            <text:p>sqlite3_clear_bindings</text:p>
          </table:table-cell>
          <table:table-cell table:formula="of:=IFERROR(VLOOKUP([.A37]; [.$D$1:.$D$63]; 1; 0); &quot;&quot;)">
            <text:p/>
          </table:table-cell>
          <table:table-cell table:formula="of:=IF(ISERROR(MATCH([.A37]; [.$D$1:.$D$63]; 0)); [.A37]; &quot;&quot;)" office:value-type="string" office:string-value="sqlite3_malloc64" calcext:value-type="string">
            <text:p>sqlite3_malloc64</text:p>
          </table:table-cell>
        </table:table-row>
        <table:table-row table:style-name="ro1">
          <table:table-cell office:value-type="string" calcext:value-type="string">
            <text:p>sqlite3_realloc</text:p>
          </table:table-cell>
          <table:table-cell table:number-columns-repeated="2"/>
          <table:table-cell office:value-type="string" calcext:value-type="string">
            <text:p>sqlite3_column_count</text:p>
          </table:table-cell>
          <table:table-cell table:formula="of:=IFERROR(VLOOKUP([.A38]; [.$D$1:.$D$63]; 1; 0); &quot;&quot;)">
            <text:p/>
          </table:table-cell>
          <table:table-cell table:formula="of:=IF(ISERROR(MATCH([.A38]; [.$D$1:.$D$63]; 0)); [.A38]; &quot;&quot;)" office:value-type="string" office:string-value="sqlite3_realloc" calcext:value-type="string">
            <text:p>sqlite3_realloc</text:p>
          </table:table-cell>
        </table:table-row>
        <table:table-row table:style-name="ro1">
          <table:table-cell office:value-type="string" calcext:value-type="string">
            <text:p>sqlite3_realloc64</text:p>
          </table:table-cell>
          <table:table-cell table:number-columns-repeated="2"/>
          <table:table-cell office:value-type="string" calcext:value-type="string">
            <text:p>sqlite3_column_name</text:p>
          </table:table-cell>
          <table:table-cell table:formula="of:=IFERROR(VLOOKUP([.A39]; [.$D$1:.$D$63]; 1; 0); &quot;&quot;)">
            <text:p/>
          </table:table-cell>
          <table:table-cell table:formula="of:=IF(ISERROR(MATCH([.A39]; [.$D$1:.$D$63]; 0)); [.A39]; &quot;&quot;)" office:value-type="string" office:string-value="sqlite3_realloc64" calcext:value-type="string">
            <text:p>sqlite3_realloc64</text:p>
          </table:table-cell>
        </table:table-row>
        <table:table-row table:style-name="ro1">
          <table:table-cell office:value-type="string" calcext:value-type="string">
            <text:p>sqlite3_free</text:p>
          </table:table-cell>
          <table:table-cell table:number-columns-repeated="2"/>
          <table:table-cell office:value-type="string" calcext:value-type="string">
            <text:p>sqlite3_column_database_name</text:p>
          </table:table-cell>
          <table:table-cell table:formula="of:=IFERROR(VLOOKUP([.A40]; [.$D$1:.$D$63]; 1; 0); &quot;&quot;)" office:value-type="string" office:string-value="sqlite3_free" calcext:value-type="string">
            <text:p>sqlite3_free</text:p>
          </table:table-cell>
          <table:table-cell table:formula="of:=IF(ISERROR(MATCH([.A40]; [.$D$1:.$D$63]; 0)); [.A40]; &quot;&quot;)">
            <text:p/>
          </table:table-cell>
        </table:table-row>
        <table:table-row table:style-name="ro1">
          <table:table-cell office:value-type="string" calcext:value-type="string">
            <text:p>sqlite3_msize</text:p>
          </table:table-cell>
          <table:table-cell table:number-columns-repeated="2"/>
          <table:table-cell office:value-type="string" calcext:value-type="string">
            <text:p>sqlite3_column_table_name</text:p>
          </table:table-cell>
          <table:table-cell table:formula="of:=IFERROR(VLOOKUP([.A41]; [.$D$1:.$D$63]; 1; 0); &quot;&quot;)">
            <text:p/>
          </table:table-cell>
          <table:table-cell table:formula="of:=IF(ISERROR(MATCH([.A41]; [.$D$1:.$D$63]; 0)); [.A41]; &quot;&quot;)" office:value-type="string" office:string-value="sqlite3_msize" calcext:value-type="string">
            <text:p>sqlite3_msize</text:p>
          </table:table-cell>
        </table:table-row>
        <table:table-row table:style-name="ro1">
          <table:table-cell office:value-type="string" calcext:value-type="string">
            <text:p>sqlite3_memory_used</text:p>
          </table:table-cell>
          <table:table-cell table:number-columns-repeated="2"/>
          <table:table-cell office:value-type="string" calcext:value-type="string">
            <text:p>sqlite3_column_origin_name</text:p>
          </table:table-cell>
          <table:table-cell table:formula="of:=IFERROR(VLOOKUP([.A42]; [.$D$1:.$D$63]; 1; 0); &quot;&quot;)">
            <text:p/>
          </table:table-cell>
          <table:table-cell table:formula="of:=IF(ISERROR(MATCH([.A42]; [.$D$1:.$D$63]; 0)); [.A42]; &quot;&quot;)" office:value-type="string" office:string-value="sqlite3_memory_used" calcext:value-type="string">
            <text:p>sqlite3_memory_used</text:p>
          </table:table-cell>
        </table:table-row>
        <table:table-row table:style-name="ro1">
          <table:table-cell office:value-type="string" calcext:value-type="string">
            <text:p>sqlite3_memory_highwater</text:p>
          </table:table-cell>
          <table:table-cell table:number-columns-repeated="2"/>
          <table:table-cell office:value-type="string" calcext:value-type="string">
            <text:p>sqlite3_column_decltype</text:p>
          </table:table-cell>
          <table:table-cell table:formula="of:=IFERROR(VLOOKUP([.A43]; [.$D$1:.$D$63]; 1; 0); &quot;&quot;)">
            <text:p/>
          </table:table-cell>
          <table:table-cell table:formula="of:=IF(ISERROR(MATCH([.A43]; [.$D$1:.$D$63]; 0)); [.A43]; &quot;&quot;)" office:value-type="string" office:string-value="sqlite3_memory_highwater" calcext:value-type="string">
            <text:p>sqlite3_memory_highwater</text:p>
          </table:table-cell>
        </table:table-row>
        <table:table-row table:style-name="ro1">
          <table:table-cell office:value-type="string" calcext:value-type="string">
            <text:p>sqlite3_randomness</text:p>
          </table:table-cell>
          <table:table-cell table:number-columns-repeated="2"/>
          <table:table-cell office:value-type="string" calcext:value-type="string">
            <text:p>sqlite3_step</text:p>
          </table:table-cell>
          <table:table-cell table:formula="of:=IFERROR(VLOOKUP([.A44]; [.$D$1:.$D$63]; 1; 0); &quot;&quot;)">
            <text:p/>
          </table:table-cell>
          <table:table-cell table:formula="of:=IF(ISERROR(MATCH([.A44]; [.$D$1:.$D$63]; 0)); [.A44]; &quot;&quot;)" office:value-type="string" office:string-value="sqlite3_randomness" calcext:value-type="string">
            <text:p>sqlite3_randomness</text:p>
          </table:table-cell>
        </table:table-row>
        <table:table-row table:style-name="ro1">
          <table:table-cell office:value-type="string" calcext:value-type="string">
            <text:p>sqlite3_set_authorizer</text:p>
          </table:table-cell>
          <table:table-cell table:number-columns-repeated="2"/>
          <table:table-cell office:value-type="string" calcext:value-type="string">
            <text:p>sqlite3_column_blob</text:p>
          </table:table-cell>
          <table:table-cell table:formula="of:=IFERROR(VLOOKUP([.A45]; [.$D$1:.$D$63]; 1; 0); &quot;&quot;)">
            <text:p/>
          </table:table-cell>
          <table:table-cell table:formula="of:=IF(ISERROR(MATCH([.A45]; [.$D$1:.$D$63]; 0)); [.A45]; &quot;&quot;)" office:value-type="string" office:string-value="sqlite3_set_authorizer" calcext:value-type="string">
            <text:p>sqlite3_set_authorizer</text:p>
          </table:table-cell>
        </table:table-row>
        <table:table-row table:style-name="ro1">
          <table:table-cell office:value-type="string" calcext:value-type="string">
            <text:p>sqlite3_trace</text:p>
          </table:table-cell>
          <table:table-cell table:number-columns-repeated="2"/>
          <table:table-cell office:value-type="string" calcext:value-type="string">
            <text:p>sqlite3_column_double</text:p>
          </table:table-cell>
          <table:table-cell table:formula="of:=IFERROR(VLOOKUP([.A46]; [.$D$1:.$D$63]; 1; 0); &quot;&quot;)">
            <text:p/>
          </table:table-cell>
          <table:table-cell table:formula="of:=IF(ISERROR(MATCH([.A46]; [.$D$1:.$D$63]; 0)); [.A46]; &quot;&quot;)" office:value-type="string" office:string-value="sqlite3_trace" calcext:value-type="string">
            <text:p>sqlite3_trace</text:p>
          </table:table-cell>
        </table:table-row>
        <table:table-row table:style-name="ro1">
          <table:table-cell office:value-type="string" calcext:value-type="string">
            <text:p>sqlite3_profile</text:p>
          </table:table-cell>
          <table:table-cell table:number-columns-repeated="2"/>
          <table:table-cell office:value-type="string" calcext:value-type="string">
            <text:p>sqlite3_column_int</text:p>
          </table:table-cell>
          <table:table-cell table:formula="of:=IFERROR(VLOOKUP([.A47]; [.$D$1:.$D$63]; 1; 0); &quot;&quot;)">
            <text:p/>
          </table:table-cell>
          <table:table-cell table:formula="of:=IF(ISERROR(MATCH([.A47]; [.$D$1:.$D$63]; 0)); [.A47]; &quot;&quot;)" office:value-type="string" office:string-value="sqlite3_profile" calcext:value-type="string">
            <text:p>sqlite3_profile</text:p>
          </table:table-cell>
        </table:table-row>
        <table:table-row table:style-name="ro1">
          <table:table-cell office:value-type="string" calcext:value-type="string">
            <text:p>sqlite3_trace_v2</text:p>
          </table:table-cell>
          <table:table-cell table:number-columns-repeated="2"/>
          <table:table-cell office:value-type="string" calcext:value-type="string">
            <text:p>sqlite3_column_int64</text:p>
          </table:table-cell>
          <table:table-cell table:formula="of:=IFERROR(VLOOKUP([.A48]; [.$D$1:.$D$63]; 1; 0); &quot;&quot;)">
            <text:p/>
          </table:table-cell>
          <table:table-cell table:formula="of:=IF(ISERROR(MATCH([.A48]; [.$D$1:.$D$63]; 0)); [.A48]; &quot;&quot;)" office:value-type="string" office:string-value="sqlite3_trace_v2" calcext:value-type="string">
            <text:p>sqlite3_trace_v2</text:p>
          </table:table-cell>
        </table:table-row>
        <table:table-row table:style-name="ro1">
          <table:table-cell office:value-type="string" calcext:value-type="string">
            <text:p>sqlite3_progress_handler</text:p>
          </table:table-cell>
          <table:table-cell table:number-columns-repeated="2"/>
          <table:table-cell office:value-type="string" calcext:value-type="string">
            <text:p>sqlite3_column_text</text:p>
          </table:table-cell>
          <table:table-cell table:formula="of:=IFERROR(VLOOKUP([.A49]; [.$D$1:.$D$63]; 1; 0); &quot;&quot;)">
            <text:p/>
          </table:table-cell>
          <table:table-cell table:formula="of:=IF(ISERROR(MATCH([.A49]; [.$D$1:.$D$63]; 0)); [.A49]; &quot;&quot;)" office:value-type="string" office:string-value="sqlite3_progress_handler" calcext:value-type="string">
            <text:p>sqlite3_progress_handler</text:p>
          </table:table-cell>
        </table:table-row>
        <table:table-row table:style-name="ro1">
          <table:table-cell office:value-type="string" calcext:value-type="string">
            <text:p>sqlite3_open</text:p>
          </table:table-cell>
          <table:table-cell table:number-columns-repeated="2"/>
          <table:table-cell office:value-type="string" calcext:value-type="string">
            <text:p>sqlite3_column_value</text:p>
          </table:table-cell>
          <table:table-cell table:formula="of:=IFERROR(VLOOKUP([.A50]; [.$D$1:.$D$63]; 1; 0); &quot;&quot;)">
            <text:p/>
          </table:table-cell>
          <table:table-cell table:formula="of:=IF(ISERROR(MATCH([.A50]; [.$D$1:.$D$63]; 0)); [.A50]; &quot;&quot;)" office:value-type="string" office:string-value="sqlite3_open" calcext:value-type="string">
            <text:p>sqlite3_open</text:p>
          </table:table-cell>
        </table:table-row>
        <table:table-row table:style-name="ro1">
          <table:table-cell office:value-type="string" calcext:value-type="string">
            <text:p>sqlite3_open16</text:p>
          </table:table-cell>
          <table:table-cell table:number-columns-repeated="2"/>
          <table:table-cell office:value-type="string" calcext:value-type="string">
            <text:p>sqlite3_column_bytes</text:p>
          </table:table-cell>
          <table:table-cell table:formula="of:=IFERROR(VLOOKUP([.A51]; [.$D$1:.$D$63]; 1; 0); &quot;&quot;)">
            <text:p/>
          </table:table-cell>
          <table:table-cell table:formula="of:=IF(ISERROR(MATCH([.A51]; [.$D$1:.$D$63]; 0)); [.A51]; &quot;&quot;)" office:value-type="string" office:string-value="sqlite3_open16" calcext:value-type="string">
            <text:p>sqlite3_open16</text:p>
          </table:table-cell>
        </table:table-row>
        <table:table-row table:style-name="ro1">
          <table:table-cell office:value-type="string" calcext:value-type="string">
            <text:p>sqlite3_open_v2</text:p>
          </table:table-cell>
          <table:table-cell table:number-columns-repeated="2"/>
          <table:table-cell office:value-type="string" calcext:value-type="string">
            <text:p>sqlite3_column_type</text:p>
          </table:table-cell>
          <table:table-cell table:formula="of:=IFERROR(VLOOKUP([.A52]; [.$D$1:.$D$63]; 1; 0); &quot;&quot;)" office:value-type="string" office:string-value="sqlite3_open_v2" calcext:value-type="string">
            <text:p>sqlite3_open_v2</text:p>
          </table:table-cell>
          <table:table-cell table:formula="of:=IF(ISERROR(MATCH([.A52]; [.$D$1:.$D$63]; 0)); [.A52]; &quot;&quot;)">
            <text:p/>
          </table:table-cell>
        </table:table-row>
        <table:table-row table:style-name="ro1">
          <table:table-cell office:value-type="string" calcext:value-type="string">
            <text:p>sqlite3_uri_parameter</text:p>
          </table:table-cell>
          <table:table-cell table:number-columns-repeated="2"/>
          <table:table-cell office:value-type="string" calcext:value-type="string">
            <text:p>sqlite3_finalize</text:p>
          </table:table-cell>
          <table:table-cell table:formula="of:=IFERROR(VLOOKUP([.A53]; [.$D$1:.$D$63]; 1; 0); &quot;&quot;)">
            <text:p/>
          </table:table-cell>
          <table:table-cell table:formula="of:=IF(ISERROR(MATCH([.A53]; [.$D$1:.$D$63]; 0)); [.A53]; &quot;&quot;)" office:value-type="string" office:string-value="sqlite3_uri_parameter" calcext:value-type="string">
            <text:p>sqlite3_uri_parameter</text:p>
          </table:table-cell>
        </table:table-row>
        <table:table-row table:style-name="ro1">
          <table:table-cell office:value-type="string" calcext:value-type="string">
            <text:p>sqlite3_uri_boolean</text:p>
          </table:table-cell>
          <table:table-cell table:number-columns-repeated="2"/>
          <table:table-cell office:value-type="string" calcext:value-type="string">
            <text:p>sqlite3_reset</text:p>
          </table:table-cell>
          <table:table-cell table:formula="of:=IFERROR(VLOOKUP([.A54]; [.$D$1:.$D$63]; 1; 0); &quot;&quot;)">
            <text:p/>
          </table:table-cell>
          <table:table-cell table:formula="of:=IF(ISERROR(MATCH([.A54]; [.$D$1:.$D$63]; 0)); [.A54]; &quot;&quot;)" office:value-type="string" office:string-value="sqlite3_uri_boolean" calcext:value-type="string">
            <text:p>sqlite3_uri_boolean</text:p>
          </table:table-cell>
        </table:table-row>
        <table:table-row table:style-name="ro1">
          <table:table-cell office:value-type="string" calcext:value-type="string">
            <text:p>sqlite3_uri_int64</text:p>
          </table:table-cell>
          <table:table-cell table:number-columns-repeated="2"/>
          <table:table-cell office:value-type="string" calcext:value-type="string">
            <text:p>sqlite3_get_autocommit</text:p>
          </table:table-cell>
          <table:table-cell table:formula="of:=IFERROR(VLOOKUP([.A55]; [.$D$1:.$D$63]; 1; 0); &quot;&quot;)">
            <text:p/>
          </table:table-cell>
          <table:table-cell table:formula="of:=IF(ISERROR(MATCH([.A55]; [.$D$1:.$D$63]; 0)); [.A55]; &quot;&quot;)" office:value-type="string" office:string-value="sqlite3_uri_int64" calcext:value-type="string">
            <text:p>sqlite3_uri_int64</text:p>
          </table:table-cell>
        </table:table-row>
        <table:table-row table:style-name="ro1">
          <table:table-cell office:value-type="string" calcext:value-type="string">
            <text:p>sqlite3_uri_key</text:p>
          </table:table-cell>
          <table:table-cell table:number-columns-repeated="2"/>
          <table:table-cell office:value-type="string" calcext:value-type="string">
            <text:p>sqlite3_db_readonly</text:p>
          </table:table-cell>
          <table:table-cell table:formula="of:=IFERROR(VLOOKUP([.A56]; [.$D$1:.$D$63]; 1; 0); &quot;&quot;)">
            <text:p/>
          </table:table-cell>
          <table:table-cell table:formula="of:=IF(ISERROR(MATCH([.A56]; [.$D$1:.$D$63]; 0)); [.A56]; &quot;&quot;)" office:value-type="string" office:string-value="sqlite3_uri_key" calcext:value-type="string">
            <text:p>sqlite3_uri_key</text:p>
          </table:table-cell>
        </table:table-row>
        <table:table-row table:style-name="ro1">
          <table:table-cell office:value-type="string" calcext:value-type="string">
            <text:p>sqlite3_filename_database</text:p>
          </table:table-cell>
          <table:table-cell table:number-columns-repeated="2"/>
          <table:table-cell office:value-type="string" calcext:value-type="string">
            <text:p>sqlite3_txn_state</text:p>
          </table:table-cell>
          <table:table-cell table:formula="of:=IFERROR(VLOOKUP([.A57]; [.$D$1:.$D$63]; 1; 0); &quot;&quot;)">
            <text:p/>
          </table:table-cell>
          <table:table-cell table:formula="of:=IF(ISERROR(MATCH([.A57]; [.$D$1:.$D$63]; 0)); [.A57]; &quot;&quot;)" office:value-type="string" office:string-value="sqlite3_filename_database" calcext:value-type="string">
            <text:p>sqlite3_filename_database</text:p>
          </table:table-cell>
        </table:table-row>
        <table:table-row table:style-name="ro1">
          <table:table-cell office:value-type="string" calcext:value-type="string">
            <text:p>sqlite3_filename_journal</text:p>
          </table:table-cell>
          <table:table-cell table:number-columns-repeated="2"/>
          <table:table-cell office:value-type="string" calcext:value-type="string">
            <text:p>sqlite3_table_column_metadata</text:p>
          </table:table-cell>
          <table:table-cell table:formula="of:=IFERROR(VLOOKUP([.A58]; [.$D$1:.$D$63]; 1; 0); &quot;&quot;)">
            <text:p/>
          </table:table-cell>
          <table:table-cell table:formula="of:=IF(ISERROR(MATCH([.A58]; [.$D$1:.$D$63]; 0)); [.A58]; &quot;&quot;)" office:value-type="string" office:string-value="sqlite3_filename_journal" calcext:value-type="string">
            <text:p>sqlite3_filename_journal</text:p>
          </table:table-cell>
        </table:table-row>
        <table:table-row table:style-name="ro1">
          <table:table-cell office:value-type="string" calcext:value-type="string">
            <text:p>sqlite3_filename_wal</text:p>
          </table:table-cell>
          <table:table-cell table:number-columns-repeated="2"/>
          <table:table-cell office:value-type="string" calcext:value-type="string">
            <text:p>sqlite3_backup_init</text:p>
          </table:table-cell>
          <table:table-cell table:formula="of:=IFERROR(VLOOKUP([.A59]; [.$D$1:.$D$63]; 1; 0); &quot;&quot;)">
            <text:p/>
          </table:table-cell>
          <table:table-cell table:formula="of:=IF(ISERROR(MATCH([.A59]; [.$D$1:.$D$63]; 0)); [.A59]; &quot;&quot;)" office:value-type="string" office:string-value="sqlite3_filename_wal" calcext:value-type="string">
            <text:p>sqlite3_filename_wal</text:p>
          </table:table-cell>
        </table:table-row>
        <table:table-row table:style-name="ro1">
          <table:table-cell office:value-type="string" calcext:value-type="string">
            <text:p>sqlite3_database_file_object</text:p>
          </table:table-cell>
          <table:table-cell table:number-columns-repeated="2"/>
          <table:table-cell office:value-type="string" calcext:value-type="string">
            <text:p>sqlite3_backup_step</text:p>
          </table:table-cell>
          <table:table-cell table:formula="of:=IFERROR(VLOOKUP([.A60]; [.$D$1:.$D$63]; 1; 0); &quot;&quot;)">
            <text:p/>
          </table:table-cell>
          <table:table-cell table:formula="of:=IF(ISERROR(MATCH([.A60]; [.$D$1:.$D$63]; 0)); [.A60]; &quot;&quot;)" office:value-type="string" office:string-value="sqlite3_database_file_object" calcext:value-type="string">
            <text:p>sqlite3_database_file_object</text:p>
          </table:table-cell>
        </table:table-row>
        <table:table-row table:style-name="ro1">
          <table:table-cell office:value-type="string" calcext:value-type="string">
            <text:p>sqlite3_create_filename</text:p>
          </table:table-cell>
          <table:table-cell table:number-columns-repeated="2"/>
          <table:table-cell office:value-type="string" calcext:value-type="string">
            <text:p>sqlite3_backup_finish</text:p>
          </table:table-cell>
          <table:table-cell table:formula="of:=IFERROR(VLOOKUP([.A61]; [.$D$1:.$D$63]; 1; 0); &quot;&quot;)">
            <text:p/>
          </table:table-cell>
          <table:table-cell table:formula="of:=IF(ISERROR(MATCH([.A61]; [.$D$1:.$D$63]; 0)); [.A61]; &quot;&quot;)" office:value-type="string" office:string-value="sqlite3_create_filename" calcext:value-type="string">
            <text:p>sqlite3_create_filename</text:p>
          </table:table-cell>
        </table:table-row>
        <table:table-row table:style-name="ro1">
          <table:table-cell office:value-type="string" calcext:value-type="string">
            <text:p>sqlite3_free_filename</text:p>
          </table:table-cell>
          <table:table-cell table:number-columns-repeated="2"/>
          <table:table-cell office:value-type="string" calcext:value-type="string">
            <text:p>sqlite3_backup_remaining</text:p>
          </table:table-cell>
          <table:table-cell table:formula="of:=IFERROR(VLOOKUP([.A62]; [.$D$1:.$D$63]; 1; 0); &quot;&quot;)">
            <text:p/>
          </table:table-cell>
          <table:table-cell table:formula="of:=IF(ISERROR(MATCH([.A62]; [.$D$1:.$D$63]; 0)); [.A62]; &quot;&quot;)" office:value-type="string" office:string-value="sqlite3_free_filename" calcext:value-type="string">
            <text:p>sqlite3_free_filename</text:p>
          </table:table-cell>
        </table:table-row>
        <table:table-row table:style-name="ro1">
          <table:table-cell office:value-type="string" calcext:value-type="string">
            <text:p>sqlite3_errcode</text:p>
          </table:table-cell>
          <table:table-cell table:number-columns-repeated="2"/>
          <table:table-cell office:value-type="string" calcext:value-type="string">
            <text:p>sqlite3_backup_pagecount</text:p>
          </table:table-cell>
          <table:table-cell table:formula="of:=IFERROR(VLOOKUP([.A63]; [.$D$1:.$D$63]; 1; 0); &quot;&quot;)" office:value-type="string" office:string-value="sqlite3_errcode" calcext:value-type="string">
            <text:p>sqlite3_errcode</text:p>
          </table:table-cell>
          <table:table-cell table:formula="of:=IF(ISERROR(MATCH([.A63]; [.$D$1:.$D$63]; 0)); [.A63]; &quot;&quot;)">
            <text:p/>
          </table:table-cell>
        </table:table-row>
        <table:table-row table:style-name="ro1">
          <table:table-cell office:value-type="string" calcext:value-type="string">
            <text:p>sqlite3_extended_errcode</text:p>
          </table:table-cell>
          <table:table-cell table:number-columns-repeated="3"/>
          <table:table-cell table:formula="of:=IFERROR(VLOOKUP([.A64]; [.$D$1:.$D$63]; 1; 0); &quot;&quot;)" office:value-type="string" office:string-value="sqlite3_extended_errcode" calcext:value-type="string">
            <text:p>sqlite3_extended_errcode</text:p>
          </table:table-cell>
          <table:table-cell table:formula="of:=IF(ISERROR(MATCH([.A64]; [.$D$1:.$D$63]; 0)); [.A64]; &quot;&quot;)">
            <text:p/>
          </table:table-cell>
        </table:table-row>
        <table:table-row table:style-name="ro1">
          <table:table-cell office:value-type="string" calcext:value-type="string">
            <text:p>sqlite3_errmsg</text:p>
          </table:table-cell>
          <table:table-cell table:number-columns-repeated="3"/>
          <table:table-cell table:formula="of:=IFERROR(VLOOKUP([.A65]; [.$D$1:.$D$63]; 1; 0); &quot;&quot;)" office:value-type="string" office:string-value="sqlite3_errmsg" calcext:value-type="string">
            <text:p>sqlite3_errmsg</text:p>
          </table:table-cell>
          <table:table-cell table:formula="of:=IF(ISERROR(MATCH([.A65]; [.$D$1:.$D$63]; 0)); [.A65]; &quot;&quot;)">
            <text:p/>
          </table:table-cell>
        </table:table-row>
        <table:table-row table:style-name="ro1">
          <table:table-cell office:value-type="string" calcext:value-type="string">
            <text:p>sqlite3_errmsg16</text:p>
          </table:table-cell>
          <table:table-cell table:number-columns-repeated="3"/>
          <table:table-cell table:formula="of:=IFERROR(VLOOKUP([.A66]; [.$D$1:.$D$63]; 1; 0); &quot;&quot;)">
            <text:p/>
          </table:table-cell>
          <table:table-cell table:formula="of:=IF(ISERROR(MATCH([.A66]; [.$D$1:.$D$63]; 0)); [.A66]; &quot;&quot;)" office:value-type="string" office:string-value="sqlite3_errmsg16" calcext:value-type="string">
            <text:p>sqlite3_errmsg16</text:p>
          </table:table-cell>
        </table:table-row>
        <table:table-row table:style-name="ro1">
          <table:table-cell office:value-type="string" calcext:value-type="string">
            <text:p>sqlite3_errstr</text:p>
          </table:table-cell>
          <table:table-cell table:number-columns-repeated="3"/>
          <table:table-cell table:formula="of:=IFERROR(VLOOKUP([.A67]; [.$D$1:.$D$63]; 1; 0); &quot;&quot;)" office:value-type="string" office:string-value="sqlite3_errstr" calcext:value-type="string">
            <text:p>sqlite3_errstr</text:p>
          </table:table-cell>
          <table:table-cell table:formula="of:=IF(ISERROR(MATCH([.A67]; [.$D$1:.$D$63]; 0)); [.A67]; &quot;&quot;)">
            <text:p/>
          </table:table-cell>
        </table:table-row>
        <table:table-row table:style-name="ro1">
          <table:table-cell office:value-type="string" calcext:value-type="string">
            <text:p>sqlite3_error_offset</text:p>
          </table:table-cell>
          <table:table-cell table:number-columns-repeated="3"/>
          <table:table-cell table:formula="of:=IFERROR(VLOOKUP([.A68]; [.$D$1:.$D$63]; 1; 0); &quot;&quot;)" office:value-type="string" office:string-value="sqlite3_error_offset" calcext:value-type="string">
            <text:p>sqlite3_error_offset</text:p>
          </table:table-cell>
          <table:table-cell table:formula="of:=IF(ISERROR(MATCH([.A68]; [.$D$1:.$D$63]; 0)); [.A68]; &quot;&quot;)">
            <text:p/>
          </table:table-cell>
        </table:table-row>
        <table:table-row table:style-name="ro1">
          <table:table-cell office:value-type="string" calcext:value-type="string">
            <text:p>sqlite3_limit</text:p>
          </table:table-cell>
          <table:table-cell table:number-columns-repeated="3"/>
          <table:table-cell table:formula="of:=IFERROR(VLOOKUP([.A69]; [.$D$1:.$D$63]; 1; 0); &quot;&quot;)" office:value-type="string" office:string-value="sqlite3_limit" calcext:value-type="string">
            <text:p>sqlite3_limit</text:p>
          </table:table-cell>
          <table:table-cell table:formula="of:=IF(ISERROR(MATCH([.A69]; [.$D$1:.$D$63]; 0)); [.A69]; &quot;&quot;)">
            <text:p/>
          </table:table-cell>
        </table:table-row>
        <table:table-row table:style-name="ro1">
          <table:table-cell office:value-type="string" calcext:value-type="string">
            <text:p>sqlite3_prepare</text:p>
          </table:table-cell>
          <table:table-cell table:number-columns-repeated="3"/>
          <table:table-cell table:formula="of:=IFERROR(VLOOKUP([.A70]; [.$D$1:.$D$63]; 1; 0); &quot;&quot;)">
            <text:p/>
          </table:table-cell>
          <table:table-cell table:formula="of:=IF(ISERROR(MATCH([.A70]; [.$D$1:.$D$63]; 0)); [.A70]; &quot;&quot;)" office:value-type="string" office:string-value="sqlite3_prepare" calcext:value-type="string">
            <text:p>sqlite3_prepare</text:p>
          </table:table-cell>
        </table:table-row>
        <table:table-row table:style-name="ro1">
          <table:table-cell office:value-type="string" calcext:value-type="string">
            <text:p>sqlite3_prepare_v2</text:p>
          </table:table-cell>
          <table:table-cell table:number-columns-repeated="3"/>
          <table:table-cell table:formula="of:=IFERROR(VLOOKUP([.A71]; [.$D$1:.$D$63]; 1; 0); &quot;&quot;)">
            <text:p/>
          </table:table-cell>
          <table:table-cell table:formula="of:=IF(ISERROR(MATCH([.A71]; [.$D$1:.$D$63]; 0)); [.A71]; &quot;&quot;)" office:value-type="string" office:string-value="sqlite3_prepare_v2" calcext:value-type="string">
            <text:p>sqlite3_prepare_v2</text:p>
          </table:table-cell>
        </table:table-row>
        <table:table-row table:style-name="ro1">
          <table:table-cell office:value-type="string" calcext:value-type="string">
            <text:p>sqlite3_prepare_v3</text:p>
          </table:table-cell>
          <table:table-cell table:number-columns-repeated="3"/>
          <table:table-cell table:formula="of:=IFERROR(VLOOKUP([.A72]; [.$D$1:.$D$63]; 1; 0); &quot;&quot;)" office:value-type="string" office:string-value="sqlite3_prepare_v3" calcext:value-type="string">
            <text:p>sqlite3_prepare_v3</text:p>
          </table:table-cell>
          <table:table-cell table:formula="of:=IF(ISERROR(MATCH([.A72]; [.$D$1:.$D$63]; 0)); [.A72]; &quot;&quot;)">
            <text:p/>
          </table:table-cell>
        </table:table-row>
        <table:table-row table:style-name="ro1">
          <table:table-cell office:value-type="string" calcext:value-type="string">
            <text:p>sqlite3_prepare16</text:p>
          </table:table-cell>
          <table:table-cell table:number-columns-repeated="3"/>
          <table:table-cell table:formula="of:=IFERROR(VLOOKUP([.A73]; [.$D$1:.$D$63]; 1; 0); &quot;&quot;)">
            <text:p/>
          </table:table-cell>
          <table:table-cell table:formula="of:=IF(ISERROR(MATCH([.A73]; [.$D$1:.$D$63]; 0)); [.A73]; &quot;&quot;)" office:value-type="string" office:string-value="sqlite3_prepare16" calcext:value-type="string">
            <text:p>sqlite3_prepare16</text:p>
          </table:table-cell>
        </table:table-row>
        <table:table-row table:style-name="ro1">
          <table:table-cell office:value-type="string" calcext:value-type="string">
            <text:p>sqlite3_prepare16_v2</text:p>
          </table:table-cell>
          <table:table-cell table:number-columns-repeated="3"/>
          <table:table-cell table:formula="of:=IFERROR(VLOOKUP([.A74]; [.$D$1:.$D$63]; 1; 0); &quot;&quot;)">
            <text:p/>
          </table:table-cell>
          <table:table-cell table:formula="of:=IF(ISERROR(MATCH([.A74]; [.$D$1:.$D$63]; 0)); [.A74]; &quot;&quot;)" office:value-type="string" office:string-value="sqlite3_prepare16_v2" calcext:value-type="string">
            <text:p>sqlite3_prepare16_v2</text:p>
          </table:table-cell>
        </table:table-row>
        <table:table-row table:style-name="ro1">
          <table:table-cell office:value-type="string" calcext:value-type="string">
            <text:p>sqlite3_prepare16_v3</text:p>
          </table:table-cell>
          <table:table-cell table:number-columns-repeated="3"/>
          <table:table-cell table:formula="of:=IFERROR(VLOOKUP([.A75]; [.$D$1:.$D$63]; 1; 0); &quot;&quot;)">
            <text:p/>
          </table:table-cell>
          <table:table-cell table:formula="of:=IF(ISERROR(MATCH([.A75]; [.$D$1:.$D$63]; 0)); [.A75]; &quot;&quot;)" office:value-type="string" office:string-value="sqlite3_prepare16_v3" calcext:value-type="string">
            <text:p>sqlite3_prepare16_v3</text:p>
          </table:table-cell>
        </table:table-row>
        <table:table-row table:style-name="ro1">
          <table:table-cell office:value-type="string" calcext:value-type="string">
            <text:p>sqlite3_sql</text:p>
          </table:table-cell>
          <table:table-cell table:number-columns-repeated="3"/>
          <table:table-cell table:formula="of:=IFERROR(VLOOKUP([.A76]; [.$D$1:.$D$63]; 1; 0); &quot;&quot;)" office:value-type="string" office:string-value="sqlite3_sql" calcext:value-type="string">
            <text:p>sqlite3_sql</text:p>
          </table:table-cell>
          <table:table-cell table:formula="of:=IF(ISERROR(MATCH([.A76]; [.$D$1:.$D$63]; 0)); [.A76]; &quot;&quot;)">
            <text:p/>
          </table:table-cell>
        </table:table-row>
        <table:table-row table:style-name="ro1">
          <table:table-cell office:value-type="string" calcext:value-type="string">
            <text:p>sqlite3_expanded_sql</text:p>
          </table:table-cell>
          <table:table-cell table:number-columns-repeated="3"/>
          <table:table-cell table:formula="of:=IFERROR(VLOOKUP([.A77]; [.$D$1:.$D$63]; 1; 0); &quot;&quot;)" office:value-type="string" office:string-value="sqlite3_expanded_sql" calcext:value-type="string">
            <text:p>sqlite3_expanded_sql</text:p>
          </table:table-cell>
          <table:table-cell table:formula="of:=IF(ISERROR(MATCH([.A77]; [.$D$1:.$D$63]; 0)); [.A77]; &quot;&quot;)">
            <text:p/>
          </table:table-cell>
        </table:table-row>
        <table:table-row table:style-name="ro1">
          <table:table-cell office:value-type="string" calcext:value-type="string">
            <text:p>sqlite3_stmt_readonly</text:p>
          </table:table-cell>
          <table:table-cell table:number-columns-repeated="3"/>
          <table:table-cell table:formula="of:=IFERROR(VLOOKUP([.A78]; [.$D$1:.$D$63]; 1; 0); &quot;&quot;)" office:value-type="string" office:string-value="sqlite3_stmt_readonly" calcext:value-type="string">
            <text:p>sqlite3_stmt_readonly</text:p>
          </table:table-cell>
          <table:table-cell table:formula="of:=IF(ISERROR(MATCH([.A78]; [.$D$1:.$D$63]; 0)); [.A78]; &quot;&quot;)">
            <text:p/>
          </table:table-cell>
        </table:table-row>
        <table:table-row table:style-name="ro1">
          <table:table-cell office:value-type="string" calcext:value-type="string">
            <text:p>sqlite3_stmt_isexplain</text:p>
          </table:table-cell>
          <table:table-cell table:number-columns-repeated="3"/>
          <table:table-cell table:formula="of:=IFERROR(VLOOKUP([.A79]; [.$D$1:.$D$63]; 1; 0); &quot;&quot;)">
            <text:p/>
          </table:table-cell>
          <table:table-cell table:formula="of:=IF(ISERROR(MATCH([.A79]; [.$D$1:.$D$63]; 0)); [.A79]; &quot;&quot;)" office:value-type="string" office:string-value="sqlite3_stmt_isexplain" calcext:value-type="string">
            <text:p>sqlite3_stmt_isexplain</text:p>
          </table:table-cell>
        </table:table-row>
        <table:table-row table:style-name="ro1">
          <table:table-cell office:value-type="string" calcext:value-type="string">
            <text:p>sqlite3_stmt_explain</text:p>
          </table:table-cell>
          <table:table-cell table:number-columns-repeated="3"/>
          <table:table-cell table:formula="of:=IFERROR(VLOOKUP([.A80]; [.$D$1:.$D$63]; 1; 0); &quot;&quot;)">
            <text:p/>
          </table:table-cell>
          <table:table-cell table:formula="of:=IF(ISERROR(MATCH([.A80]; [.$D$1:.$D$63]; 0)); [.A80]; &quot;&quot;)" office:value-type="string" office:string-value="sqlite3_stmt_explain" calcext:value-type="string">
            <text:p>sqlite3_stmt_explain</text:p>
          </table:table-cell>
        </table:table-row>
        <table:table-row table:style-name="ro1">
          <table:table-cell office:value-type="string" calcext:value-type="string">
            <text:p>sqlite3_stmt_busy</text:p>
          </table:table-cell>
          <table:table-cell table:number-columns-repeated="3"/>
          <table:table-cell table:formula="of:=IFERROR(VLOOKUP([.A81]; [.$D$1:.$D$63]; 1; 0); &quot;&quot;)" office:value-type="string" office:string-value="sqlite3_stmt_busy" calcext:value-type="string">
            <text:p>sqlite3_stmt_busy</text:p>
          </table:table-cell>
          <table:table-cell table:formula="of:=IF(ISERROR(MATCH([.A81]; [.$D$1:.$D$63]; 0)); [.A81]; &quot;&quot;)">
            <text:p/>
          </table:table-cell>
        </table:table-row>
        <table:table-row table:style-name="ro1">
          <table:table-cell office:value-type="string" calcext:value-type="string">
            <text:p>sqlite3_bind_blob</text:p>
          </table:table-cell>
          <table:table-cell table:number-columns-repeated="3"/>
          <table:table-cell table:formula="of:=IFERROR(VLOOKUP([.A82]; [.$D$1:.$D$63]; 1; 0); &quot;&quot;)" office:value-type="string" office:string-value="sqlite3_bind_blob" calcext:value-type="string">
            <text:p>sqlite3_bind_blob</text:p>
          </table:table-cell>
          <table:table-cell table:formula="of:=IF(ISERROR(MATCH([.A82]; [.$D$1:.$D$63]; 0)); [.A82]; &quot;&quot;)">
            <text:p/>
          </table:table-cell>
        </table:table-row>
        <table:table-row table:style-name="ro1">
          <table:table-cell office:value-type="string" calcext:value-type="string">
            <text:p>sqlite3_bind_blob64</text:p>
          </table:table-cell>
          <table:table-cell table:number-columns-repeated="3"/>
          <table:table-cell table:formula="of:=IFERROR(VLOOKUP([.A83]; [.$D$1:.$D$63]; 1; 0); &quot;&quot;)">
            <text:p/>
          </table:table-cell>
          <table:table-cell table:formula="of:=IF(ISERROR(MATCH([.A83]; [.$D$1:.$D$63]; 0)); [.A83]; &quot;&quot;)" office:value-type="string" office:string-value="sqlite3_bind_blob64" calcext:value-type="string">
            <text:p>sqlite3_bind_blob64</text:p>
          </table:table-cell>
        </table:table-row>
        <table:table-row table:style-name="ro1">
          <table:table-cell office:value-type="string" calcext:value-type="string">
            <text:p>sqlite3_bind_double</text:p>
          </table:table-cell>
          <table:table-cell table:number-columns-repeated="3"/>
          <table:table-cell table:formula="of:=IFERROR(VLOOKUP([.A84]; [.$D$1:.$D$63]; 1; 0); &quot;&quot;)" office:value-type="string" office:string-value="sqlite3_bind_double" calcext:value-type="string">
            <text:p>sqlite3_bind_double</text:p>
          </table:table-cell>
          <table:table-cell table:formula="of:=IF(ISERROR(MATCH([.A84]; [.$D$1:.$D$63]; 0)); [.A84]; &quot;&quot;)">
            <text:p/>
          </table:table-cell>
        </table:table-row>
        <table:table-row table:style-name="ro1">
          <table:table-cell office:value-type="string" calcext:value-type="string">
            <text:p>sqlite3_bind_int</text:p>
          </table:table-cell>
          <table:table-cell table:number-columns-repeated="3"/>
          <table:table-cell table:formula="of:=IFERROR(VLOOKUP([.A85]; [.$D$1:.$D$63]; 1; 0); &quot;&quot;)" office:value-type="string" office:string-value="sqlite3_bind_int" calcext:value-type="string">
            <text:p>sqlite3_bind_int</text:p>
          </table:table-cell>
          <table:table-cell table:formula="of:=IF(ISERROR(MATCH([.A85]; [.$D$1:.$D$63]; 0)); [.A85]; &quot;&quot;)">
            <text:p/>
          </table:table-cell>
        </table:table-row>
        <table:table-row table:style-name="ro1">
          <table:table-cell office:value-type="string" calcext:value-type="string">
            <text:p>sqlite3_bind_int64</text:p>
          </table:table-cell>
          <table:table-cell table:number-columns-repeated="3"/>
          <table:table-cell table:formula="of:=IFERROR(VLOOKUP([.A86]; [.$D$1:.$D$63]; 1; 0); &quot;&quot;)" office:value-type="string" office:string-value="sqlite3_bind_int64" calcext:value-type="string">
            <text:p>sqlite3_bind_int64</text:p>
          </table:table-cell>
          <table:table-cell table:formula="of:=IF(ISERROR(MATCH([.A86]; [.$D$1:.$D$63]; 0)); [.A86]; &quot;&quot;)">
            <text:p/>
          </table:table-cell>
        </table:table-row>
        <table:table-row table:style-name="ro1">
          <table:table-cell office:value-type="string" calcext:value-type="string">
            <text:p>sqlite3_bind_null</text:p>
          </table:table-cell>
          <table:table-cell table:number-columns-repeated="3"/>
          <table:table-cell table:formula="of:=IFERROR(VLOOKUP([.A87]; [.$D$1:.$D$63]; 1; 0); &quot;&quot;)" office:value-type="string" office:string-value="sqlite3_bind_null" calcext:value-type="string">
            <text:p>sqlite3_bind_null</text:p>
          </table:table-cell>
          <table:table-cell table:formula="of:=IF(ISERROR(MATCH([.A87]; [.$D$1:.$D$63]; 0)); [.A87]; &quot;&quot;)">
            <text:p/>
          </table:table-cell>
        </table:table-row>
        <table:table-row table:style-name="ro1">
          <table:table-cell office:value-type="string" calcext:value-type="string">
            <text:p>sqlite3_bind_text</text:p>
          </table:table-cell>
          <table:table-cell table:number-columns-repeated="3"/>
          <table:table-cell table:formula="of:=IFERROR(VLOOKUP([.A88]; [.$D$1:.$D$63]; 1; 0); &quot;&quot;)" office:value-type="string" office:string-value="sqlite3_bind_text" calcext:value-type="string">
            <text:p>sqlite3_bind_text</text:p>
          </table:table-cell>
          <table:table-cell table:formula="of:=IF(ISERROR(MATCH([.A88]; [.$D$1:.$D$63]; 0)); [.A88]; &quot;&quot;)">
            <text:p/>
          </table:table-cell>
        </table:table-row>
        <table:table-row table:style-name="ro1">
          <table:table-cell office:value-type="string" calcext:value-type="string">
            <text:p>sqlite3_bind_text16</text:p>
          </table:table-cell>
          <table:table-cell table:number-columns-repeated="3"/>
          <table:table-cell table:formula="of:=IFERROR(VLOOKUP([.A89]; [.$D$1:.$D$63]; 1; 0); &quot;&quot;)">
            <text:p/>
          </table:table-cell>
          <table:table-cell table:formula="of:=IF(ISERROR(MATCH([.A89]; [.$D$1:.$D$63]; 0)); [.A89]; &quot;&quot;)" office:value-type="string" office:string-value="sqlite3_bind_text16" calcext:value-type="string">
            <text:p>sqlite3_bind_text16</text:p>
          </table:table-cell>
        </table:table-row>
        <table:table-row table:style-name="ro1">
          <table:table-cell office:value-type="string" calcext:value-type="string">
            <text:p>sqlite3_bind_text64</text:p>
          </table:table-cell>
          <table:table-cell table:number-columns-repeated="3"/>
          <table:table-cell table:formula="of:=IFERROR(VLOOKUP([.A90]; [.$D$1:.$D$63]; 1; 0); &quot;&quot;)">
            <text:p/>
          </table:table-cell>
          <table:table-cell table:formula="of:=IF(ISERROR(MATCH([.A90]; [.$D$1:.$D$63]; 0)); [.A90]; &quot;&quot;)" office:value-type="string" office:string-value="sqlite3_bind_text64" calcext:value-type="string">
            <text:p>sqlite3_bind_text64</text:p>
          </table:table-cell>
        </table:table-row>
        <table:table-row table:style-name="ro1">
          <table:table-cell office:value-type="string" calcext:value-type="string">
            <text:p>sqlite3_bind_value</text:p>
          </table:table-cell>
          <table:table-cell table:number-columns-repeated="3"/>
          <table:table-cell table:formula="of:=IFERROR(VLOOKUP([.A91]; [.$D$1:.$D$63]; 1; 0); &quot;&quot;)" office:value-type="string" office:string-value="sqlite3_bind_value" calcext:value-type="string">
            <text:p>sqlite3_bind_value</text:p>
          </table:table-cell>
          <table:table-cell table:formula="of:=IF(ISERROR(MATCH([.A91]; [.$D$1:.$D$63]; 0)); [.A91]; &quot;&quot;)">
            <text:p/>
          </table:table-cell>
        </table:table-row>
        <table:table-row table:style-name="ro1">
          <table:table-cell office:value-type="string" calcext:value-type="string">
            <text:p>sqlite3_bind_pointer</text:p>
          </table:table-cell>
          <table:table-cell table:number-columns-repeated="3"/>
          <table:table-cell table:formula="of:=IFERROR(VLOOKUP([.A92]; [.$D$1:.$D$63]; 1; 0); &quot;&quot;)">
            <text:p/>
          </table:table-cell>
          <table:table-cell table:formula="of:=IF(ISERROR(MATCH([.A92]; [.$D$1:.$D$63]; 0)); [.A92]; &quot;&quot;)" office:value-type="string" office:string-value="sqlite3_bind_pointer" calcext:value-type="string">
            <text:p>sqlite3_bind_pointer</text:p>
          </table:table-cell>
        </table:table-row>
        <table:table-row table:style-name="ro1">
          <table:table-cell office:value-type="string" calcext:value-type="string">
            <text:p>sqlite3_bind_zeroblob</text:p>
          </table:table-cell>
          <table:table-cell table:number-columns-repeated="3"/>
          <table:table-cell table:formula="of:=IFERROR(VLOOKUP([.A93]; [.$D$1:.$D$63]; 1; 0); &quot;&quot;)">
            <text:p/>
          </table:table-cell>
          <table:table-cell table:formula="of:=IF(ISERROR(MATCH([.A93]; [.$D$1:.$D$63]; 0)); [.A93]; &quot;&quot;)" office:value-type="string" office:string-value="sqlite3_bind_zeroblob" calcext:value-type="string">
            <text:p>sqlite3_bind_zeroblob</text:p>
          </table:table-cell>
        </table:table-row>
        <table:table-row table:style-name="ro1">
          <table:table-cell office:value-type="string" calcext:value-type="string">
            <text:p>sqlite3_bind_zeroblob64</text:p>
          </table:table-cell>
          <table:table-cell table:number-columns-repeated="3"/>
          <table:table-cell table:formula="of:=IFERROR(VLOOKUP([.A94]; [.$D$1:.$D$63]; 1; 0); &quot;&quot;)">
            <text:p/>
          </table:table-cell>
          <table:table-cell table:formula="of:=IF(ISERROR(MATCH([.A94]; [.$D$1:.$D$63]; 0)); [.A94]; &quot;&quot;)" office:value-type="string" office:string-value="sqlite3_bind_zeroblob64" calcext:value-type="string">
            <text:p>sqlite3_bind_zeroblob64</text:p>
          </table:table-cell>
        </table:table-row>
        <table:table-row table:style-name="ro1">
          <table:table-cell office:value-type="string" calcext:value-type="string">
            <text:p>sqlite3_bind_parameter_count</text:p>
          </table:table-cell>
          <table:table-cell table:number-columns-repeated="3"/>
          <table:table-cell table:formula="of:=IFERROR(VLOOKUP([.A95]; [.$D$1:.$D$63]; 1; 0); &quot;&quot;)" office:value-type="string" office:string-value="sqlite3_bind_parameter_count" calcext:value-type="string">
            <text:p>sqlite3_bind_parameter_count</text:p>
          </table:table-cell>
          <table:table-cell table:formula="of:=IF(ISERROR(MATCH([.A95]; [.$D$1:.$D$63]; 0)); [.A95]; &quot;&quot;)">
            <text:p/>
          </table:table-cell>
        </table:table-row>
        <table:table-row table:style-name="ro1">
          <table:table-cell office:value-type="string" calcext:value-type="string">
            <text:p>sqlite3_bind_parameter_name</text:p>
          </table:table-cell>
          <table:table-cell table:number-columns-repeated="3"/>
          <table:table-cell table:formula="of:=IFERROR(VLOOKUP([.A96]; [.$D$1:.$D$63]; 1; 0); &quot;&quot;)" office:value-type="string" office:string-value="sqlite3_bind_parameter_name" calcext:value-type="string">
            <text:p>sqlite3_bind_parameter_name</text:p>
          </table:table-cell>
          <table:table-cell table:formula="of:=IF(ISERROR(MATCH([.A96]; [.$D$1:.$D$63]; 0)); [.A96]; &quot;&quot;)">
            <text:p/>
          </table:table-cell>
        </table:table-row>
        <table:table-row table:style-name="ro1">
          <table:table-cell office:value-type="string" calcext:value-type="string">
            <text:p>sqlite3_bind_parameter_index</text:p>
          </table:table-cell>
          <table:table-cell table:number-columns-repeated="3"/>
          <table:table-cell table:formula="of:=IFERROR(VLOOKUP([.A97]; [.$D$1:.$D$63]; 1; 0); &quot;&quot;)" office:value-type="string" office:string-value="sqlite3_bind_parameter_index" calcext:value-type="string">
            <text:p>sqlite3_bind_parameter_index</text:p>
          </table:table-cell>
          <table:table-cell table:formula="of:=IF(ISERROR(MATCH([.A97]; [.$D$1:.$D$63]; 0)); [.A97]; &quot;&quot;)">
            <text:p/>
          </table:table-cell>
        </table:table-row>
        <table:table-row table:style-name="ro1">
          <table:table-cell office:value-type="string" calcext:value-type="string">
            <text:p>sqlite3_clear_bindings</text:p>
          </table:table-cell>
          <table:table-cell table:number-columns-repeated="3"/>
          <table:table-cell table:formula="of:=IFERROR(VLOOKUP([.A98]; [.$D$1:.$D$63]; 1; 0); &quot;&quot;)" office:value-type="string" office:string-value="sqlite3_clear_bindings" calcext:value-type="string">
            <text:p>sqlite3_clear_bindings</text:p>
          </table:table-cell>
          <table:table-cell table:formula="of:=IF(ISERROR(MATCH([.A98]; [.$D$1:.$D$63]; 0)); [.A98]; &quot;&quot;)">
            <text:p/>
          </table:table-cell>
        </table:table-row>
        <table:table-row table:style-name="ro1">
          <table:table-cell office:value-type="string" calcext:value-type="string">
            <text:p>sqlite3_column_count</text:p>
          </table:table-cell>
          <table:table-cell table:number-columns-repeated="3"/>
          <table:table-cell table:formula="of:=IFERROR(VLOOKUP([.A99]; [.$D$1:.$D$63]; 1; 0); &quot;&quot;)" office:value-type="string" office:string-value="sqlite3_column_count" calcext:value-type="string">
            <text:p>sqlite3_column_count</text:p>
          </table:table-cell>
          <table:table-cell table:formula="of:=IF(ISERROR(MATCH([.A99]; [.$D$1:.$D$63]; 0)); [.A99]; &quot;&quot;)">
            <text:p/>
          </table:table-cell>
        </table:table-row>
        <table:table-row table:style-name="ro1">
          <table:table-cell office:value-type="string" calcext:value-type="string">
            <text:p>sqlite3_column_name</text:p>
          </table:table-cell>
          <table:table-cell table:number-columns-repeated="3"/>
          <table:table-cell table:formula="of:=IFERROR(VLOOKUP([.A100]; [.$D$1:.$D$63]; 1; 0); &quot;&quot;)" office:value-type="string" office:string-value="sqlite3_column_name" calcext:value-type="string">
            <text:p>sqlite3_column_name</text:p>
          </table:table-cell>
          <table:table-cell table:formula="of:=IF(ISERROR(MATCH([.A100]; [.$D$1:.$D$63]; 0)); [.A100]; &quot;&quot;)">
            <text:p/>
          </table:table-cell>
        </table:table-row>
        <table:table-row table:style-name="ro1">
          <table:table-cell office:value-type="string" calcext:value-type="string">
            <text:p>sqlite3_column_name16</text:p>
          </table:table-cell>
          <table:table-cell table:number-columns-repeated="3"/>
          <table:table-cell table:formula="of:=IFERROR(VLOOKUP([.A101]; [.$D$1:.$D$63]; 1; 0); &quot;&quot;)">
            <text:p/>
          </table:table-cell>
          <table:table-cell table:formula="of:=IF(ISERROR(MATCH([.A101]; [.$D$1:.$D$63]; 0)); [.A101]; &quot;&quot;)" office:value-type="string" office:string-value="sqlite3_column_name16" calcext:value-type="string">
            <text:p>sqlite3_column_name16</text:p>
          </table:table-cell>
        </table:table-row>
        <table:table-row table:style-name="ro1">
          <table:table-cell office:value-type="string" calcext:value-type="string">
            <text:p>sqlite3_column_database_name</text:p>
          </table:table-cell>
          <table:table-cell table:number-columns-repeated="3"/>
          <table:table-cell table:formula="of:=IFERROR(VLOOKUP([.A102]; [.$D$1:.$D$63]; 1; 0); &quot;&quot;)" office:value-type="string" office:string-value="sqlite3_column_database_name" calcext:value-type="string">
            <text:p>sqlite3_column_database_name</text:p>
          </table:table-cell>
          <table:table-cell table:formula="of:=IF(ISERROR(MATCH([.A102]; [.$D$1:.$D$63]; 0)); [.A102]; &quot;&quot;)">
            <text:p/>
          </table:table-cell>
        </table:table-row>
        <table:table-row table:style-name="ro1">
          <table:table-cell office:value-type="string" calcext:value-type="string">
            <text:p>sqlite3_column_database_name16</text:p>
          </table:table-cell>
          <table:table-cell table:number-columns-repeated="3"/>
          <table:table-cell table:formula="of:=IFERROR(VLOOKUP([.A103]; [.$D$1:.$D$63]; 1; 0); &quot;&quot;)">
            <text:p/>
          </table:table-cell>
          <table:table-cell table:formula="of:=IF(ISERROR(MATCH([.A103]; [.$D$1:.$D$63]; 0)); [.A103]; &quot;&quot;)" office:value-type="string" office:string-value="sqlite3_column_database_name16" calcext:value-type="string">
            <text:p>sqlite3_column_database_name16</text:p>
          </table:table-cell>
        </table:table-row>
        <table:table-row table:style-name="ro1">
          <table:table-cell office:value-type="string" calcext:value-type="string">
            <text:p>sqlite3_column_table_name</text:p>
          </table:table-cell>
          <table:table-cell table:number-columns-repeated="3"/>
          <table:table-cell table:formula="of:=IFERROR(VLOOKUP([.A104]; [.$D$1:.$D$63]; 1; 0); &quot;&quot;)" office:value-type="string" office:string-value="sqlite3_column_table_name" calcext:value-type="string">
            <text:p>sqlite3_column_table_name</text:p>
          </table:table-cell>
          <table:table-cell table:formula="of:=IF(ISERROR(MATCH([.A104]; [.$D$1:.$D$63]; 0)); [.A104]; &quot;&quot;)">
            <text:p/>
          </table:table-cell>
        </table:table-row>
        <table:table-row table:style-name="ro1">
          <table:table-cell office:value-type="string" calcext:value-type="string">
            <text:p>sqlite3_column_table_name16</text:p>
          </table:table-cell>
          <table:table-cell table:number-columns-repeated="3"/>
          <table:table-cell table:formula="of:=IFERROR(VLOOKUP([.A105]; [.$D$1:.$D$63]; 1; 0); &quot;&quot;)">
            <text:p/>
          </table:table-cell>
          <table:table-cell table:formula="of:=IF(ISERROR(MATCH([.A105]; [.$D$1:.$D$63]; 0)); [.A105]; &quot;&quot;)" office:value-type="string" office:string-value="sqlite3_column_table_name16" calcext:value-type="string">
            <text:p>sqlite3_column_table_name16</text:p>
          </table:table-cell>
        </table:table-row>
        <table:table-row table:style-name="ro1">
          <table:table-cell office:value-type="string" calcext:value-type="string">
            <text:p>sqlite3_column_origin_name</text:p>
          </table:table-cell>
          <table:table-cell table:number-columns-repeated="3"/>
          <table:table-cell table:formula="of:=IFERROR(VLOOKUP([.A106]; [.$D$1:.$D$63]; 1; 0); &quot;&quot;)" office:value-type="string" office:string-value="sqlite3_column_origin_name" calcext:value-type="string">
            <text:p>sqlite3_column_origin_name</text:p>
          </table:table-cell>
          <table:table-cell table:formula="of:=IF(ISERROR(MATCH([.A106]; [.$D$1:.$D$63]; 0)); [.A106]; &quot;&quot;)">
            <text:p/>
          </table:table-cell>
        </table:table-row>
        <table:table-row table:style-name="ro1">
          <table:table-cell office:value-type="string" calcext:value-type="string">
            <text:p>sqlite3_column_origin_name16</text:p>
          </table:table-cell>
          <table:table-cell table:number-columns-repeated="3"/>
          <table:table-cell table:formula="of:=IFERROR(VLOOKUP([.A107]; [.$D$1:.$D$63]; 1; 0); &quot;&quot;)">
            <text:p/>
          </table:table-cell>
          <table:table-cell table:formula="of:=IF(ISERROR(MATCH([.A107]; [.$D$1:.$D$63]; 0)); [.A107]; &quot;&quot;)" office:value-type="string" office:string-value="sqlite3_column_origin_name16" calcext:value-type="string">
            <text:p>sqlite3_column_origin_name16</text:p>
          </table:table-cell>
        </table:table-row>
        <table:table-row table:style-name="ro1">
          <table:table-cell office:value-type="string" calcext:value-type="string">
            <text:p>sqlite3_column_decltype</text:p>
          </table:table-cell>
          <table:table-cell table:number-columns-repeated="3"/>
          <table:table-cell table:formula="of:=IFERROR(VLOOKUP([.A108]; [.$D$1:.$D$63]; 1; 0); &quot;&quot;)" office:value-type="string" office:string-value="sqlite3_column_decltype" calcext:value-type="string">
            <text:p>sqlite3_column_decltype</text:p>
          </table:table-cell>
          <table:table-cell table:formula="of:=IF(ISERROR(MATCH([.A108]; [.$D$1:.$D$63]; 0)); [.A108]; &quot;&quot;)">
            <text:p/>
          </table:table-cell>
        </table:table-row>
        <table:table-row table:style-name="ro1">
          <table:table-cell office:value-type="string" calcext:value-type="string">
            <text:p>sqlite3_column_decltype16</text:p>
          </table:table-cell>
          <table:table-cell table:number-columns-repeated="3"/>
          <table:table-cell table:formula="of:=IFERROR(VLOOKUP([.A109]; [.$D$1:.$D$63]; 1; 0); &quot;&quot;)">
            <text:p/>
          </table:table-cell>
          <table:table-cell table:formula="of:=IF(ISERROR(MATCH([.A109]; [.$D$1:.$D$63]; 0)); [.A109]; &quot;&quot;)" office:value-type="string" office:string-value="sqlite3_column_decltype16" calcext:value-type="string">
            <text:p>sqlite3_column_decltype16</text:p>
          </table:table-cell>
        </table:table-row>
        <table:table-row table:style-name="ro1">
          <table:table-cell office:value-type="string" calcext:value-type="string">
            <text:p>sqlite3_step</text:p>
          </table:table-cell>
          <table:table-cell table:number-columns-repeated="3"/>
          <table:table-cell table:formula="of:=IFERROR(VLOOKUP([.A110]; [.$D$1:.$D$63]; 1; 0); &quot;&quot;)" office:value-type="string" office:string-value="sqlite3_step" calcext:value-type="string">
            <text:p>sqlite3_step</text:p>
          </table:table-cell>
          <table:table-cell table:formula="of:=IF(ISERROR(MATCH([.A110]; [.$D$1:.$D$63]; 0)); [.A110]; &quot;&quot;)">
            <text:p/>
          </table:table-cell>
        </table:table-row>
        <table:table-row table:style-name="ro1">
          <table:table-cell office:value-type="string" calcext:value-type="string">
            <text:p>sqlite3_data_count</text:p>
          </table:table-cell>
          <table:table-cell table:number-columns-repeated="3"/>
          <table:table-cell table:formula="of:=IFERROR(VLOOKUP([.A111]; [.$D$1:.$D$63]; 1; 0); &quot;&quot;)">
            <text:p/>
          </table:table-cell>
          <table:table-cell table:formula="of:=IF(ISERROR(MATCH([.A111]; [.$D$1:.$D$63]; 0)); [.A111]; &quot;&quot;)" office:value-type="string" office:string-value="sqlite3_data_count" calcext:value-type="string">
            <text:p>sqlite3_data_count</text:p>
          </table:table-cell>
        </table:table-row>
        <table:table-row table:style-name="ro1">
          <table:table-cell office:value-type="string" calcext:value-type="string">
            <text:p>sqlite3_column_blob</text:p>
          </table:table-cell>
          <table:table-cell table:number-columns-repeated="3"/>
          <table:table-cell table:formula="of:=IFERROR(VLOOKUP([.A112]; [.$D$1:.$D$63]; 1; 0); &quot;&quot;)" office:value-type="string" office:string-value="sqlite3_column_blob" calcext:value-type="string">
            <text:p>sqlite3_column_blob</text:p>
          </table:table-cell>
          <table:table-cell table:formula="of:=IF(ISERROR(MATCH([.A112]; [.$D$1:.$D$63]; 0)); [.A112]; &quot;&quot;)">
            <text:p/>
          </table:table-cell>
        </table:table-row>
        <table:table-row table:style-name="ro1">
          <table:table-cell office:value-type="string" calcext:value-type="string">
            <text:p>sqlite3_column_double</text:p>
          </table:table-cell>
          <table:table-cell table:number-columns-repeated="3"/>
          <table:table-cell table:formula="of:=IFERROR(VLOOKUP([.A113]; [.$D$1:.$D$63]; 1; 0); &quot;&quot;)" office:value-type="string" office:string-value="sqlite3_column_double" calcext:value-type="string">
            <text:p>sqlite3_column_double</text:p>
          </table:table-cell>
          <table:table-cell table:formula="of:=IF(ISERROR(MATCH([.A113]; [.$D$1:.$D$63]; 0)); [.A113]; &quot;&quot;)">
            <text:p/>
          </table:table-cell>
        </table:table-row>
        <table:table-row table:style-name="ro1">
          <table:table-cell office:value-type="string" calcext:value-type="string">
            <text:p>sqlite3_column_int</text:p>
          </table:table-cell>
          <table:table-cell table:number-columns-repeated="3"/>
          <table:table-cell table:formula="of:=IFERROR(VLOOKUP([.A114]; [.$D$1:.$D$63]; 1; 0); &quot;&quot;)" office:value-type="string" office:string-value="sqlite3_column_int" calcext:value-type="string">
            <text:p>sqlite3_column_int</text:p>
          </table:table-cell>
          <table:table-cell table:formula="of:=IF(ISERROR(MATCH([.A114]; [.$D$1:.$D$63]; 0)); [.A114]; &quot;&quot;)">
            <text:p/>
          </table:table-cell>
        </table:table-row>
        <table:table-row table:style-name="ro1">
          <table:table-cell office:value-type="string" calcext:value-type="string">
            <text:p>sqlite3_column_int64</text:p>
          </table:table-cell>
          <table:table-cell table:number-columns-repeated="3"/>
          <table:table-cell table:formula="of:=IFERROR(VLOOKUP([.A115]; [.$D$1:.$D$63]; 1; 0); &quot;&quot;)" office:value-type="string" office:string-value="sqlite3_column_int64" calcext:value-type="string">
            <text:p>sqlite3_column_int64</text:p>
          </table:table-cell>
          <table:table-cell table:formula="of:=IF(ISERROR(MATCH([.A115]; [.$D$1:.$D$63]; 0)); [.A115]; &quot;&quot;)">
            <text:p/>
          </table:table-cell>
        </table:table-row>
        <table:table-row table:style-name="ro1">
          <table:table-cell office:value-type="string" calcext:value-type="string">
            <text:p>sqlite3_column_text</text:p>
          </table:table-cell>
          <table:table-cell table:number-columns-repeated="3"/>
          <table:table-cell table:formula="of:=IFERROR(VLOOKUP([.A116]; [.$D$1:.$D$63]; 1; 0); &quot;&quot;)" office:value-type="string" office:string-value="sqlite3_column_text" calcext:value-type="string">
            <text:p>sqlite3_column_text</text:p>
          </table:table-cell>
          <table:table-cell table:formula="of:=IF(ISERROR(MATCH([.A116]; [.$D$1:.$D$63]; 0)); [.A116]; &quot;&quot;)">
            <text:p/>
          </table:table-cell>
        </table:table-row>
        <table:table-row table:style-name="ro1">
          <table:table-cell office:value-type="string" calcext:value-type="string">
            <text:p>sqlite3_column_text16</text:p>
          </table:table-cell>
          <table:table-cell table:number-columns-repeated="3"/>
          <table:table-cell table:formula="of:=IFERROR(VLOOKUP([.A117]; [.$D$1:.$D$63]; 1; 0); &quot;&quot;)">
            <text:p/>
          </table:table-cell>
          <table:table-cell table:formula="of:=IF(ISERROR(MATCH([.A117]; [.$D$1:.$D$63]; 0)); [.A117]; &quot;&quot;)" office:value-type="string" office:string-value="sqlite3_column_text16" calcext:value-type="string">
            <text:p>sqlite3_column_text16</text:p>
          </table:table-cell>
        </table:table-row>
        <table:table-row table:style-name="ro1">
          <table:table-cell office:value-type="string" calcext:value-type="string">
            <text:p>sqlite3_column_value</text:p>
          </table:table-cell>
          <table:table-cell table:number-columns-repeated="3"/>
          <table:table-cell table:formula="of:=IFERROR(VLOOKUP([.A118]; [.$D$1:.$D$63]; 1; 0); &quot;&quot;)" office:value-type="string" office:string-value="sqlite3_column_value" calcext:value-type="string">
            <text:p>sqlite3_column_value</text:p>
          </table:table-cell>
          <table:table-cell table:formula="of:=IF(ISERROR(MATCH([.A118]; [.$D$1:.$D$63]; 0)); [.A118]; &quot;&quot;)">
            <text:p/>
          </table:table-cell>
        </table:table-row>
        <table:table-row table:style-name="ro1">
          <table:table-cell office:value-type="string" calcext:value-type="string">
            <text:p>sqlite3_column_bytes</text:p>
          </table:table-cell>
          <table:table-cell table:number-columns-repeated="3"/>
          <table:table-cell table:formula="of:=IFERROR(VLOOKUP([.A119]; [.$D$1:.$D$63]; 1; 0); &quot;&quot;)" office:value-type="string" office:string-value="sqlite3_column_bytes" calcext:value-type="string">
            <text:p>sqlite3_column_bytes</text:p>
          </table:table-cell>
          <table:table-cell table:formula="of:=IF(ISERROR(MATCH([.A119]; [.$D$1:.$D$63]; 0)); [.A119]; &quot;&quot;)">
            <text:p/>
          </table:table-cell>
        </table:table-row>
        <table:table-row table:style-name="ro1">
          <table:table-cell office:value-type="string" calcext:value-type="string">
            <text:p>sqlite3_column_bytes16</text:p>
          </table:table-cell>
          <table:table-cell table:number-columns-repeated="3"/>
          <table:table-cell table:formula="of:=IFERROR(VLOOKUP([.A120]; [.$D$1:.$D$63]; 1; 0); &quot;&quot;)">
            <text:p/>
          </table:table-cell>
          <table:table-cell table:formula="of:=IF(ISERROR(MATCH([.A120]; [.$D$1:.$D$63]; 0)); [.A120]; &quot;&quot;)" office:value-type="string" office:string-value="sqlite3_column_bytes16" calcext:value-type="string">
            <text:p>sqlite3_column_bytes16</text:p>
          </table:table-cell>
        </table:table-row>
        <table:table-row table:style-name="ro1">
          <table:table-cell office:value-type="string" calcext:value-type="string">
            <text:p>sqlite3_column_type</text:p>
          </table:table-cell>
          <table:table-cell table:number-columns-repeated="3"/>
          <table:table-cell table:formula="of:=IFERROR(VLOOKUP([.A121]; [.$D$1:.$D$63]; 1; 0); &quot;&quot;)" office:value-type="string" office:string-value="sqlite3_column_type" calcext:value-type="string">
            <text:p>sqlite3_column_type</text:p>
          </table:table-cell>
          <table:table-cell table:formula="of:=IF(ISERROR(MATCH([.A121]; [.$D$1:.$D$63]; 0)); [.A121]; &quot;&quot;)">
            <text:p/>
          </table:table-cell>
        </table:table-row>
        <table:table-row table:style-name="ro1">
          <table:table-cell office:value-type="string" calcext:value-type="string">
            <text:p>sqlite3_finalize</text:p>
          </table:table-cell>
          <table:table-cell table:number-columns-repeated="3"/>
          <table:table-cell table:formula="of:=IFERROR(VLOOKUP([.A122]; [.$D$1:.$D$63]; 1; 0); &quot;&quot;)" office:value-type="string" office:string-value="sqlite3_finalize" calcext:value-type="string">
            <text:p>sqlite3_finalize</text:p>
          </table:table-cell>
          <table:table-cell table:formula="of:=IF(ISERROR(MATCH([.A122]; [.$D$1:.$D$63]; 0)); [.A122]; &quot;&quot;)">
            <text:p/>
          </table:table-cell>
        </table:table-row>
        <table:table-row table:style-name="ro1">
          <table:table-cell office:value-type="string" calcext:value-type="string">
            <text:p>sqlite3_reset</text:p>
          </table:table-cell>
          <table:table-cell table:number-columns-repeated="3"/>
          <table:table-cell table:formula="of:=IFERROR(VLOOKUP([.A123]; [.$D$1:.$D$63]; 1; 0); &quot;&quot;)" office:value-type="string" office:string-value="sqlite3_reset" calcext:value-type="string">
            <text:p>sqlite3_reset</text:p>
          </table:table-cell>
          <table:table-cell table:formula="of:=IF(ISERROR(MATCH([.A123]; [.$D$1:.$D$63]; 0)); [.A123]; &quot;&quot;)">
            <text:p/>
          </table:table-cell>
        </table:table-row>
        <table:table-row table:style-name="ro1">
          <table:table-cell office:value-type="string" calcext:value-type="string">
            <text:p>sqlite3_create_function</text:p>
          </table:table-cell>
          <table:table-cell table:number-columns-repeated="3"/>
          <table:table-cell table:formula="of:=IFERROR(VLOOKUP([.A124]; [.$D$1:.$D$63]; 1; 0); &quot;&quot;)">
            <text:p/>
          </table:table-cell>
          <table:table-cell table:formula="of:=IF(ISERROR(MATCH([.A124]; [.$D$1:.$D$63]; 0)); [.A124]; &quot;&quot;)" office:value-type="string" office:string-value="sqlite3_create_function" calcext:value-type="string">
            <text:p>sqlite3_create_function</text:p>
          </table:table-cell>
        </table:table-row>
        <table:table-row table:style-name="ro1">
          <table:table-cell office:value-type="string" calcext:value-type="string">
            <text:p>sqlite3_create_function16</text:p>
          </table:table-cell>
          <table:table-cell table:number-columns-repeated="3"/>
          <table:table-cell table:formula="of:=IFERROR(VLOOKUP([.A125]; [.$D$1:.$D$63]; 1; 0); &quot;&quot;)">
            <text:p/>
          </table:table-cell>
          <table:table-cell table:formula="of:=IF(ISERROR(MATCH([.A125]; [.$D$1:.$D$63]; 0)); [.A125]; &quot;&quot;)" office:value-type="string" office:string-value="sqlite3_create_function16" calcext:value-type="string">
            <text:p>sqlite3_create_function16</text:p>
          </table:table-cell>
        </table:table-row>
        <table:table-row table:style-name="ro1">
          <table:table-cell office:value-type="string" calcext:value-type="string">
            <text:p>sqlite3_create_function_v2</text:p>
          </table:table-cell>
          <table:table-cell table:number-columns-repeated="3"/>
          <table:table-cell table:formula="of:=IFERROR(VLOOKUP([.A126]; [.$D$1:.$D$63]; 1; 0); &quot;&quot;)">
            <text:p/>
          </table:table-cell>
          <table:table-cell table:formula="of:=IF(ISERROR(MATCH([.A126]; [.$D$1:.$D$63]; 0)); [.A126]; &quot;&quot;)" office:value-type="string" office:string-value="sqlite3_create_function_v2" calcext:value-type="string">
            <text:p>sqlite3_create_function_v2</text:p>
          </table:table-cell>
        </table:table-row>
        <table:table-row table:style-name="ro1">
          <table:table-cell office:value-type="string" calcext:value-type="string">
            <text:p>sqlite3_create_window_function</text:p>
          </table:table-cell>
          <table:table-cell table:number-columns-repeated="3"/>
          <table:table-cell table:formula="of:=IFERROR(VLOOKUP([.A127]; [.$D$1:.$D$63]; 1; 0); &quot;&quot;)">
            <text:p/>
          </table:table-cell>
          <table:table-cell table:formula="of:=IF(ISERROR(MATCH([.A127]; [.$D$1:.$D$63]; 0)); [.A127]; &quot;&quot;)" office:value-type="string" office:string-value="sqlite3_create_window_function" calcext:value-type="string">
            <text:p>sqlite3_create_window_function</text:p>
          </table:table-cell>
        </table:table-row>
        <table:table-row table:style-name="ro1">
          <table:table-cell office:value-type="string" calcext:value-type="string">
            <text:p>sqlite3_aggregate_count</text:p>
          </table:table-cell>
          <table:table-cell table:number-columns-repeated="3"/>
          <table:table-cell table:formula="of:=IFERROR(VLOOKUP([.A128]; [.$D$1:.$D$63]; 1; 0); &quot;&quot;)">
            <text:p/>
          </table:table-cell>
          <table:table-cell table:formula="of:=IF(ISERROR(MATCH([.A128]; [.$D$1:.$D$63]; 0)); [.A128]; &quot;&quot;)" office:value-type="string" office:string-value="sqlite3_aggregate_count" calcext:value-type="string">
            <text:p>sqlite3_aggregate_count</text:p>
          </table:table-cell>
        </table:table-row>
        <table:table-row table:style-name="ro1">
          <table:table-cell office:value-type="string" calcext:value-type="string">
            <text:p>sqlite3_expired</text:p>
          </table:table-cell>
          <table:table-cell table:number-columns-repeated="3"/>
          <table:table-cell table:formula="of:=IFERROR(VLOOKUP([.A129]; [.$D$1:.$D$63]; 1; 0); &quot;&quot;)">
            <text:p/>
          </table:table-cell>
          <table:table-cell table:formula="of:=IF(ISERROR(MATCH([.A129]; [.$D$1:.$D$63]; 0)); [.A129]; &quot;&quot;)" office:value-type="string" office:string-value="sqlite3_expired" calcext:value-type="string">
            <text:p>sqlite3_expired</text:p>
          </table:table-cell>
        </table:table-row>
        <table:table-row table:style-name="ro1">
          <table:table-cell office:value-type="string" calcext:value-type="string">
            <text:p>sqlite3_transfer_bindings</text:p>
          </table:table-cell>
          <table:table-cell table:number-columns-repeated="3"/>
          <table:table-cell table:formula="of:=IFERROR(VLOOKUP([.A130]; [.$D$1:.$D$63]; 1; 0); &quot;&quot;)">
            <text:p/>
          </table:table-cell>
          <table:table-cell table:formula="of:=IF(ISERROR(MATCH([.A130]; [.$D$1:.$D$63]; 0)); [.A130]; &quot;&quot;)" office:value-type="string" office:string-value="sqlite3_transfer_bindings" calcext:value-type="string">
            <text:p>sqlite3_transfer_bindings</text:p>
          </table:table-cell>
        </table:table-row>
        <table:table-row table:style-name="ro1">
          <table:table-cell office:value-type="string" calcext:value-type="string">
            <text:p>sqlite3_global_recover</text:p>
          </table:table-cell>
          <table:table-cell table:number-columns-repeated="3"/>
          <table:table-cell table:formula="of:=IFERROR(VLOOKUP([.A131]; [.$D$1:.$D$63]; 1; 0); &quot;&quot;)">
            <text:p/>
          </table:table-cell>
          <table:table-cell table:formula="of:=IF(ISERROR(MATCH([.A131]; [.$D$1:.$D$63]; 0)); [.A131]; &quot;&quot;)" office:value-type="string" office:string-value="sqlite3_global_recover" calcext:value-type="string">
            <text:p>sqlite3_global_recover</text:p>
          </table:table-cell>
        </table:table-row>
        <table:table-row table:style-name="ro1">
          <table:table-cell office:value-type="string" calcext:value-type="string">
            <text:p>sqlite3_thread_cleanup</text:p>
          </table:table-cell>
          <table:table-cell table:number-columns-repeated="3"/>
          <table:table-cell table:formula="of:=IFERROR(VLOOKUP([.A132]; [.$D$1:.$D$63]; 1; 0); &quot;&quot;)">
            <text:p/>
          </table:table-cell>
          <table:table-cell table:formula="of:=IF(ISERROR(MATCH([.A132]; [.$D$1:.$D$63]; 0)); [.A132]; &quot;&quot;)" office:value-type="string" office:string-value="sqlite3_thread_cleanup" calcext:value-type="string">
            <text:p>sqlite3_thread_cleanup</text:p>
          </table:table-cell>
        </table:table-row>
        <table:table-row table:style-name="ro1">
          <table:table-cell office:value-type="string" calcext:value-type="string">
            <text:p>sqlite3_memory_alarm</text:p>
          </table:table-cell>
          <table:table-cell table:number-columns-repeated="3"/>
          <table:table-cell table:formula="of:=IFERROR(VLOOKUP([.A133]; [.$D$1:.$D$63]; 1; 0); &quot;&quot;)">
            <text:p/>
          </table:table-cell>
          <table:table-cell table:formula="of:=IF(ISERROR(MATCH([.A133]; [.$D$1:.$D$63]; 0)); [.A133]; &quot;&quot;)" office:value-type="string" office:string-value="sqlite3_memory_alarm" calcext:value-type="string">
            <text:p>sqlite3_memory_alarm</text:p>
          </table:table-cell>
        </table:table-row>
        <table:table-row table:style-name="ro1">
          <table:table-cell office:value-type="string" calcext:value-type="string">
            <text:p>sqlite3_value_blob</text:p>
          </table:table-cell>
          <table:table-cell table:number-columns-repeated="3"/>
          <table:table-cell table:formula="of:=IFERROR(VLOOKUP([.A134]; [.$D$1:.$D$63]; 1; 0); &quot;&quot;)">
            <text:p/>
          </table:table-cell>
          <table:table-cell table:formula="of:=IF(ISERROR(MATCH([.A134]; [.$D$1:.$D$63]; 0)); [.A134]; &quot;&quot;)" office:value-type="string" office:string-value="sqlite3_value_blob" calcext:value-type="string">
            <text:p>sqlite3_value_blob</text:p>
          </table:table-cell>
        </table:table-row>
        <table:table-row table:style-name="ro1">
          <table:table-cell office:value-type="string" calcext:value-type="string">
            <text:p>sqlite3_value_double</text:p>
          </table:table-cell>
          <table:table-cell table:number-columns-repeated="3"/>
          <table:table-cell table:formula="of:=IFERROR(VLOOKUP([.A135]; [.$D$1:.$D$63]; 1; 0); &quot;&quot;)">
            <text:p/>
          </table:table-cell>
          <table:table-cell table:formula="of:=IF(ISERROR(MATCH([.A135]; [.$D$1:.$D$63]; 0)); [.A135]; &quot;&quot;)" office:value-type="string" office:string-value="sqlite3_value_double" calcext:value-type="string">
            <text:p>sqlite3_value_double</text:p>
          </table:table-cell>
        </table:table-row>
        <table:table-row table:style-name="ro1">
          <table:table-cell office:value-type="string" calcext:value-type="string">
            <text:p>sqlite3_value_int</text:p>
          </table:table-cell>
          <table:table-cell table:number-columns-repeated="3"/>
          <table:table-cell table:formula="of:=IFERROR(VLOOKUP([.A136]; [.$D$1:.$D$63]; 1; 0); &quot;&quot;)">
            <text:p/>
          </table:table-cell>
          <table:table-cell table:formula="of:=IF(ISERROR(MATCH([.A136]; [.$D$1:.$D$63]; 0)); [.A136]; &quot;&quot;)" office:value-type="string" office:string-value="sqlite3_value_int" calcext:value-type="string">
            <text:p>sqlite3_value_int</text:p>
          </table:table-cell>
        </table:table-row>
        <table:table-row table:style-name="ro1">
          <table:table-cell office:value-type="string" calcext:value-type="string">
            <text:p>sqlite3_value_int64</text:p>
          </table:table-cell>
          <table:table-cell table:number-columns-repeated="3"/>
          <table:table-cell table:formula="of:=IFERROR(VLOOKUP([.A137]; [.$D$1:.$D$63]; 1; 0); &quot;&quot;)">
            <text:p/>
          </table:table-cell>
          <table:table-cell table:formula="of:=IF(ISERROR(MATCH([.A137]; [.$D$1:.$D$63]; 0)); [.A137]; &quot;&quot;)" office:value-type="string" office:string-value="sqlite3_value_int64" calcext:value-type="string">
            <text:p>sqlite3_value_int64</text:p>
          </table:table-cell>
        </table:table-row>
        <table:table-row table:style-name="ro1">
          <table:table-cell office:value-type="string" calcext:value-type="string">
            <text:p>sqlite3_value_pointer</text:p>
          </table:table-cell>
          <table:table-cell table:number-columns-repeated="3"/>
          <table:table-cell table:formula="of:=IFERROR(VLOOKUP([.A138]; [.$D$1:.$D$63]; 1; 0); &quot;&quot;)">
            <text:p/>
          </table:table-cell>
          <table:table-cell table:formula="of:=IF(ISERROR(MATCH([.A138]; [.$D$1:.$D$63]; 0)); [.A138]; &quot;&quot;)" office:value-type="string" office:string-value="sqlite3_value_pointer" calcext:value-type="string">
            <text:p>sqlite3_value_pointer</text:p>
          </table:table-cell>
        </table:table-row>
        <table:table-row table:style-name="ro1">
          <table:table-cell office:value-type="string" calcext:value-type="string">
            <text:p>sqlite3_value_text</text:p>
          </table:table-cell>
          <table:table-cell table:number-columns-repeated="3"/>
          <table:table-cell table:formula="of:=IFERROR(VLOOKUP([.A139]; [.$D$1:.$D$63]; 1; 0); &quot;&quot;)">
            <text:p/>
          </table:table-cell>
          <table:table-cell table:formula="of:=IF(ISERROR(MATCH([.A139]; [.$D$1:.$D$63]; 0)); [.A139]; &quot;&quot;)" office:value-type="string" office:string-value="sqlite3_value_text" calcext:value-type="string">
            <text:p>sqlite3_value_text</text:p>
          </table:table-cell>
        </table:table-row>
        <table:table-row table:style-name="ro1">
          <table:table-cell office:value-type="string" calcext:value-type="string">
            <text:p>sqlite3_value_text16</text:p>
          </table:table-cell>
          <table:table-cell table:number-columns-repeated="3"/>
          <table:table-cell table:formula="of:=IFERROR(VLOOKUP([.A140]; [.$D$1:.$D$63]; 1; 0); &quot;&quot;)">
            <text:p/>
          </table:table-cell>
          <table:table-cell table:formula="of:=IF(ISERROR(MATCH([.A140]; [.$D$1:.$D$63]; 0)); [.A140]; &quot;&quot;)" office:value-type="string" office:string-value="sqlite3_value_text16" calcext:value-type="string">
            <text:p>sqlite3_value_text16</text:p>
          </table:table-cell>
        </table:table-row>
        <table:table-row table:style-name="ro1">
          <table:table-cell office:value-type="string" calcext:value-type="string">
            <text:p>sqlite3_value_text16le</text:p>
          </table:table-cell>
          <table:table-cell table:number-columns-repeated="3"/>
          <table:table-cell table:formula="of:=IFERROR(VLOOKUP([.A141]; [.$D$1:.$D$63]; 1; 0); &quot;&quot;)">
            <text:p/>
          </table:table-cell>
          <table:table-cell table:formula="of:=IF(ISERROR(MATCH([.A141]; [.$D$1:.$D$63]; 0)); [.A141]; &quot;&quot;)" office:value-type="string" office:string-value="sqlite3_value_text16le" calcext:value-type="string">
            <text:p>sqlite3_value_text16le</text:p>
          </table:table-cell>
        </table:table-row>
        <table:table-row table:style-name="ro1">
          <table:table-cell office:value-type="string" calcext:value-type="string">
            <text:p>sqlite3_value_text16be</text:p>
          </table:table-cell>
          <table:table-cell table:number-columns-repeated="3"/>
          <table:table-cell table:formula="of:=IFERROR(VLOOKUP([.A142]; [.$D$1:.$D$63]; 1; 0); &quot;&quot;)">
            <text:p/>
          </table:table-cell>
          <table:table-cell table:formula="of:=IF(ISERROR(MATCH([.A142]; [.$D$1:.$D$63]; 0)); [.A142]; &quot;&quot;)" office:value-type="string" office:string-value="sqlite3_value_text16be" calcext:value-type="string">
            <text:p>sqlite3_value_text16be</text:p>
          </table:table-cell>
        </table:table-row>
        <table:table-row table:style-name="ro1">
          <table:table-cell office:value-type="string" calcext:value-type="string">
            <text:p>sqlite3_value_bytes</text:p>
          </table:table-cell>
          <table:table-cell table:number-columns-repeated="3"/>
          <table:table-cell table:formula="of:=IFERROR(VLOOKUP([.A143]; [.$D$1:.$D$63]; 1; 0); &quot;&quot;)">
            <text:p/>
          </table:table-cell>
          <table:table-cell table:formula="of:=IF(ISERROR(MATCH([.A143]; [.$D$1:.$D$63]; 0)); [.A143]; &quot;&quot;)" office:value-type="string" office:string-value="sqlite3_value_bytes" calcext:value-type="string">
            <text:p>sqlite3_value_bytes</text:p>
          </table:table-cell>
        </table:table-row>
        <table:table-row table:style-name="ro1">
          <table:table-cell office:value-type="string" calcext:value-type="string">
            <text:p>sqlite3_value_bytes16</text:p>
          </table:table-cell>
          <table:table-cell table:number-columns-repeated="3"/>
          <table:table-cell table:formula="of:=IFERROR(VLOOKUP([.A144]; [.$D$1:.$D$63]; 1; 0); &quot;&quot;)">
            <text:p/>
          </table:table-cell>
          <table:table-cell table:formula="of:=IF(ISERROR(MATCH([.A144]; [.$D$1:.$D$63]; 0)); [.A144]; &quot;&quot;)" office:value-type="string" office:string-value="sqlite3_value_bytes16" calcext:value-type="string">
            <text:p>sqlite3_value_bytes16</text:p>
          </table:table-cell>
        </table:table-row>
        <table:table-row table:style-name="ro1">
          <table:table-cell office:value-type="string" calcext:value-type="string">
            <text:p>sqlite3_value_type</text:p>
          </table:table-cell>
          <table:table-cell table:number-columns-repeated="3"/>
          <table:table-cell table:formula="of:=IFERROR(VLOOKUP([.A145]; [.$D$1:.$D$63]; 1; 0); &quot;&quot;)">
            <text:p/>
          </table:table-cell>
          <table:table-cell table:formula="of:=IF(ISERROR(MATCH([.A145]; [.$D$1:.$D$63]; 0)); [.A145]; &quot;&quot;)" office:value-type="string" office:string-value="sqlite3_value_type" calcext:value-type="string">
            <text:p>sqlite3_value_type</text:p>
          </table:table-cell>
        </table:table-row>
        <table:table-row table:style-name="ro1">
          <table:table-cell office:value-type="string" calcext:value-type="string">
            <text:p>sqlite3_value_numeric_type</text:p>
          </table:table-cell>
          <table:table-cell table:number-columns-repeated="3"/>
          <table:table-cell table:formula="of:=IFERROR(VLOOKUP([.A146]; [.$D$1:.$D$63]; 1; 0); &quot;&quot;)">
            <text:p/>
          </table:table-cell>
          <table:table-cell table:formula="of:=IF(ISERROR(MATCH([.A146]; [.$D$1:.$D$63]; 0)); [.A146]; &quot;&quot;)" office:value-type="string" office:string-value="sqlite3_value_numeric_type" calcext:value-type="string">
            <text:p>sqlite3_value_numeric_type</text:p>
          </table:table-cell>
        </table:table-row>
        <table:table-row table:style-name="ro1">
          <table:table-cell office:value-type="string" calcext:value-type="string">
            <text:p>sqlite3_value_nochange</text:p>
          </table:table-cell>
          <table:table-cell table:number-columns-repeated="3"/>
          <table:table-cell table:formula="of:=IFERROR(VLOOKUP([.A147]; [.$D$1:.$D$63]; 1; 0); &quot;&quot;)">
            <text:p/>
          </table:table-cell>
          <table:table-cell table:formula="of:=IF(ISERROR(MATCH([.A147]; [.$D$1:.$D$63]; 0)); [.A147]; &quot;&quot;)" office:value-type="string" office:string-value="sqlite3_value_nochange" calcext:value-type="string">
            <text:p>sqlite3_value_nochange</text:p>
          </table:table-cell>
        </table:table-row>
        <table:table-row table:style-name="ro1">
          <table:table-cell office:value-type="string" calcext:value-type="string">
            <text:p>sqlite3_value_frombind</text:p>
          </table:table-cell>
          <table:table-cell table:number-columns-repeated="3"/>
          <table:table-cell table:formula="of:=IFERROR(VLOOKUP([.A148]; [.$D$1:.$D$63]; 1; 0); &quot;&quot;)">
            <text:p/>
          </table:table-cell>
          <table:table-cell table:formula="of:=IF(ISERROR(MATCH([.A148]; [.$D$1:.$D$63]; 0)); [.A148]; &quot;&quot;)" office:value-type="string" office:string-value="sqlite3_value_frombind" calcext:value-type="string">
            <text:p>sqlite3_value_frombind</text:p>
          </table:table-cell>
        </table:table-row>
        <table:table-row table:style-name="ro1">
          <table:table-cell office:value-type="string" calcext:value-type="string">
            <text:p>sqlite3_value_encoding</text:p>
          </table:table-cell>
          <table:table-cell table:number-columns-repeated="3"/>
          <table:table-cell table:formula="of:=IFERROR(VLOOKUP([.A149]; [.$D$1:.$D$63]; 1; 0); &quot;&quot;)">
            <text:p/>
          </table:table-cell>
          <table:table-cell table:formula="of:=IF(ISERROR(MATCH([.A149]; [.$D$1:.$D$63]; 0)); [.A149]; &quot;&quot;)" office:value-type="string" office:string-value="sqlite3_value_encoding" calcext:value-type="string">
            <text:p>sqlite3_value_encoding</text:p>
          </table:table-cell>
        </table:table-row>
        <table:table-row table:style-name="ro1">
          <table:table-cell office:value-type="string" calcext:value-type="string">
            <text:p>sqlite3_value_subtype</text:p>
          </table:table-cell>
          <table:table-cell table:number-columns-repeated="3"/>
          <table:table-cell table:formula="of:=IFERROR(VLOOKUP([.A150]; [.$D$1:.$D$63]; 1; 0); &quot;&quot;)">
            <text:p/>
          </table:table-cell>
          <table:table-cell table:formula="of:=IF(ISERROR(MATCH([.A150]; [.$D$1:.$D$63]; 0)); [.A150]; &quot;&quot;)" office:value-type="string" office:string-value="sqlite3_value_subtype" calcext:value-type="string">
            <text:p>sqlite3_value_subtype</text:p>
          </table:table-cell>
        </table:table-row>
        <table:table-row table:style-name="ro1">
          <table:table-cell office:value-type="string" calcext:value-type="string">
            <text:p>sqlite3_value_dup</text:p>
          </table:table-cell>
          <table:table-cell table:number-columns-repeated="3"/>
          <table:table-cell table:formula="of:=IFERROR(VLOOKUP([.A151]; [.$D$1:.$D$63]; 1; 0); &quot;&quot;)">
            <text:p/>
          </table:table-cell>
          <table:table-cell table:formula="of:=IF(ISERROR(MATCH([.A151]; [.$D$1:.$D$63]; 0)); [.A151]; &quot;&quot;)" office:value-type="string" office:string-value="sqlite3_value_dup" calcext:value-type="string">
            <text:p>sqlite3_value_dup</text:p>
          </table:table-cell>
        </table:table-row>
        <table:table-row table:style-name="ro1">
          <table:table-cell office:value-type="string" calcext:value-type="string">
            <text:p>sqlite3_value_free</text:p>
          </table:table-cell>
          <table:table-cell table:number-columns-repeated="3"/>
          <table:table-cell table:formula="of:=IFERROR(VLOOKUP([.A152]; [.$D$1:.$D$63]; 1; 0); &quot;&quot;)">
            <text:p/>
          </table:table-cell>
          <table:table-cell table:formula="of:=IF(ISERROR(MATCH([.A152]; [.$D$1:.$D$63]; 0)); [.A152]; &quot;&quot;)" office:value-type="string" office:string-value="sqlite3_value_free" calcext:value-type="string">
            <text:p>sqlite3_value_free</text:p>
          </table:table-cell>
        </table:table-row>
        <table:table-row table:style-name="ro1">
          <table:table-cell office:value-type="string" calcext:value-type="string">
            <text:p>sqlite3_aggregate_context</text:p>
          </table:table-cell>
          <table:table-cell table:number-columns-repeated="3"/>
          <table:table-cell table:formula="of:=IFERROR(VLOOKUP([.A153]; [.$D$1:.$D$63]; 1; 0); &quot;&quot;)">
            <text:p/>
          </table:table-cell>
          <table:table-cell table:formula="of:=IF(ISERROR(MATCH([.A153]; [.$D$1:.$D$63]; 0)); [.A153]; &quot;&quot;)" office:value-type="string" office:string-value="sqlite3_aggregate_context" calcext:value-type="string">
            <text:p>sqlite3_aggregate_context</text:p>
          </table:table-cell>
        </table:table-row>
        <table:table-row table:style-name="ro1">
          <table:table-cell office:value-type="string" calcext:value-type="string">
            <text:p>sqlite3_user_data</text:p>
          </table:table-cell>
          <table:table-cell table:number-columns-repeated="3"/>
          <table:table-cell table:formula="of:=IFERROR(VLOOKUP([.A154]; [.$D$1:.$D$63]; 1; 0); &quot;&quot;)">
            <text:p/>
          </table:table-cell>
          <table:table-cell table:formula="of:=IF(ISERROR(MATCH([.A154]; [.$D$1:.$D$63]; 0)); [.A154]; &quot;&quot;)" office:value-type="string" office:string-value="sqlite3_user_data" calcext:value-type="string">
            <text:p>sqlite3_user_data</text:p>
          </table:table-cell>
        </table:table-row>
        <table:table-row table:style-name="ro1">
          <table:table-cell office:value-type="string" calcext:value-type="string">
            <text:p>sqlite3_context_db_handle</text:p>
          </table:table-cell>
          <table:table-cell table:number-columns-repeated="3"/>
          <table:table-cell table:formula="of:=IFERROR(VLOOKUP([.A155]; [.$D$1:.$D$63]; 1; 0); &quot;&quot;)">
            <text:p/>
          </table:table-cell>
          <table:table-cell table:formula="of:=IF(ISERROR(MATCH([.A155]; [.$D$1:.$D$63]; 0)); [.A155]; &quot;&quot;)" office:value-type="string" office:string-value="sqlite3_context_db_handle" calcext:value-type="string">
            <text:p>sqlite3_context_db_handle</text:p>
          </table:table-cell>
        </table:table-row>
        <table:table-row table:style-name="ro1">
          <table:table-cell office:value-type="string" calcext:value-type="string">
            <text:p>sqlite3_get_auxdata</text:p>
          </table:table-cell>
          <table:table-cell table:number-columns-repeated="3"/>
          <table:table-cell table:formula="of:=IFERROR(VLOOKUP([.A156]; [.$D$1:.$D$63]; 1; 0); &quot;&quot;)">
            <text:p/>
          </table:table-cell>
          <table:table-cell table:formula="of:=IF(ISERROR(MATCH([.A156]; [.$D$1:.$D$63]; 0)); [.A156]; &quot;&quot;)" office:value-type="string" office:string-value="sqlite3_get_auxdata" calcext:value-type="string">
            <text:p>sqlite3_get_auxdata</text:p>
          </table:table-cell>
        </table:table-row>
        <table:table-row table:style-name="ro1">
          <table:table-cell office:value-type="string" calcext:value-type="string">
            <text:p>sqlite3_set_auxdata</text:p>
          </table:table-cell>
          <table:table-cell table:number-columns-repeated="3"/>
          <table:table-cell table:formula="of:=IFERROR(VLOOKUP([.A157]; [.$D$1:.$D$63]; 1; 0); &quot;&quot;)">
            <text:p/>
          </table:table-cell>
          <table:table-cell table:formula="of:=IF(ISERROR(MATCH([.A157]; [.$D$1:.$D$63]; 0)); [.A157]; &quot;&quot;)" office:value-type="string" office:string-value="sqlite3_set_auxdata" calcext:value-type="string">
            <text:p>sqlite3_set_auxdata</text:p>
          </table:table-cell>
        </table:table-row>
        <table:table-row table:style-name="ro1">
          <table:table-cell office:value-type="string" calcext:value-type="string">
            <text:p>sqlite3_get_clientdata</text:p>
          </table:table-cell>
          <table:table-cell table:number-columns-repeated="3"/>
          <table:table-cell table:formula="of:=IFERROR(VLOOKUP([.A158]; [.$D$1:.$D$63]; 1; 0); &quot;&quot;)">
            <text:p/>
          </table:table-cell>
          <table:table-cell table:formula="of:=IF(ISERROR(MATCH([.A158]; [.$D$1:.$D$63]; 0)); [.A158]; &quot;&quot;)" office:value-type="string" office:string-value="sqlite3_get_clientdata" calcext:value-type="string">
            <text:p>sqlite3_get_clientdata</text:p>
          </table:table-cell>
        </table:table-row>
        <table:table-row table:style-name="ro1">
          <table:table-cell office:value-type="string" calcext:value-type="string">
            <text:p>sqlite3_set_clientdata</text:p>
          </table:table-cell>
          <table:table-cell table:number-columns-repeated="3"/>
          <table:table-cell table:formula="of:=IFERROR(VLOOKUP([.A159]; [.$D$1:.$D$63]; 1; 0); &quot;&quot;)">
            <text:p/>
          </table:table-cell>
          <table:table-cell table:formula="of:=IF(ISERROR(MATCH([.A159]; [.$D$1:.$D$63]; 0)); [.A159]; &quot;&quot;)" office:value-type="string" office:string-value="sqlite3_set_clientdata" calcext:value-type="string">
            <text:p>sqlite3_set_clientdata</text:p>
          </table:table-cell>
        </table:table-row>
        <table:table-row table:style-name="ro1">
          <table:table-cell office:value-type="string" calcext:value-type="string">
            <text:p>sqlite3_result_blob</text:p>
          </table:table-cell>
          <table:table-cell table:number-columns-repeated="3"/>
          <table:table-cell table:formula="of:=IFERROR(VLOOKUP([.A160]; [.$D$1:.$D$63]; 1; 0); &quot;&quot;)">
            <text:p/>
          </table:table-cell>
          <table:table-cell table:formula="of:=IF(ISERROR(MATCH([.A160]; [.$D$1:.$D$63]; 0)); [.A160]; &quot;&quot;)" office:value-type="string" office:string-value="sqlite3_result_blob" calcext:value-type="string">
            <text:p>sqlite3_result_blob</text:p>
          </table:table-cell>
        </table:table-row>
        <table:table-row table:style-name="ro1">
          <table:table-cell office:value-type="string" calcext:value-type="string">
            <text:p>sqlite3_result_blob64</text:p>
          </table:table-cell>
          <table:table-cell table:number-columns-repeated="3"/>
          <table:table-cell table:formula="of:=IFERROR(VLOOKUP([.A161]; [.$D$1:.$D$63]; 1; 0); &quot;&quot;)">
            <text:p/>
          </table:table-cell>
          <table:table-cell table:formula="of:=IF(ISERROR(MATCH([.A161]; [.$D$1:.$D$63]; 0)); [.A161]; &quot;&quot;)" office:value-type="string" office:string-value="sqlite3_result_blob64" calcext:value-type="string">
            <text:p>sqlite3_result_blob64</text:p>
          </table:table-cell>
        </table:table-row>
        <table:table-row table:style-name="ro1">
          <table:table-cell office:value-type="string" calcext:value-type="string">
            <text:p>sqlite3_result_double</text:p>
          </table:table-cell>
          <table:table-cell table:number-columns-repeated="3"/>
          <table:table-cell table:formula="of:=IFERROR(VLOOKUP([.A162]; [.$D$1:.$D$63]; 1; 0); &quot;&quot;)">
            <text:p/>
          </table:table-cell>
          <table:table-cell table:formula="of:=IF(ISERROR(MATCH([.A162]; [.$D$1:.$D$63]; 0)); [.A162]; &quot;&quot;)" office:value-type="string" office:string-value="sqlite3_result_double" calcext:value-type="string">
            <text:p>sqlite3_result_double</text:p>
          </table:table-cell>
        </table:table-row>
        <table:table-row table:style-name="ro1">
          <table:table-cell office:value-type="string" calcext:value-type="string">
            <text:p>sqlite3_result_error</text:p>
          </table:table-cell>
          <table:table-cell table:number-columns-repeated="3"/>
          <table:table-cell table:formula="of:=IFERROR(VLOOKUP([.A163]; [.$D$1:.$D$63]; 1; 0); &quot;&quot;)">
            <text:p/>
          </table:table-cell>
          <table:table-cell table:formula="of:=IF(ISERROR(MATCH([.A163]; [.$D$1:.$D$63]; 0)); [.A163]; &quot;&quot;)" office:value-type="string" office:string-value="sqlite3_result_error" calcext:value-type="string">
            <text:p>sqlite3_result_error</text:p>
          </table:table-cell>
        </table:table-row>
        <table:table-row table:style-name="ro1">
          <table:table-cell office:value-type="string" calcext:value-type="string">
            <text:p>sqlite3_result_error16</text:p>
          </table:table-cell>
          <table:table-cell table:number-columns-repeated="3"/>
          <table:table-cell table:formula="of:=IFERROR(VLOOKUP([.A164]; [.$D$1:.$D$63]; 1; 0); &quot;&quot;)">
            <text:p/>
          </table:table-cell>
          <table:table-cell table:formula="of:=IF(ISERROR(MATCH([.A164]; [.$D$1:.$D$63]; 0)); [.A164]; &quot;&quot;)" office:value-type="string" office:string-value="sqlite3_result_error16" calcext:value-type="string">
            <text:p>sqlite3_result_error16</text:p>
          </table:table-cell>
        </table:table-row>
        <table:table-row table:style-name="ro1">
          <table:table-cell office:value-type="string" calcext:value-type="string">
            <text:p>sqlite3_result_error_toobig</text:p>
          </table:table-cell>
          <table:table-cell table:number-columns-repeated="3"/>
          <table:table-cell table:formula="of:=IFERROR(VLOOKUP([.A165]; [.$D$1:.$D$63]; 1; 0); &quot;&quot;)">
            <text:p/>
          </table:table-cell>
          <table:table-cell table:formula="of:=IF(ISERROR(MATCH([.A165]; [.$D$1:.$D$63]; 0)); [.A165]; &quot;&quot;)" office:value-type="string" office:string-value="sqlite3_result_error_toobig" calcext:value-type="string">
            <text:p>sqlite3_result_error_toobig</text:p>
          </table:table-cell>
        </table:table-row>
        <table:table-row table:style-name="ro1">
          <table:table-cell office:value-type="string" calcext:value-type="string">
            <text:p>sqlite3_result_error_nomem</text:p>
          </table:table-cell>
          <table:table-cell table:number-columns-repeated="3"/>
          <table:table-cell table:formula="of:=IFERROR(VLOOKUP([.A166]; [.$D$1:.$D$63]; 1; 0); &quot;&quot;)">
            <text:p/>
          </table:table-cell>
          <table:table-cell table:formula="of:=IF(ISERROR(MATCH([.A166]; [.$D$1:.$D$63]; 0)); [.A166]; &quot;&quot;)" office:value-type="string" office:string-value="sqlite3_result_error_nomem" calcext:value-type="string">
            <text:p>sqlite3_result_error_nomem</text:p>
          </table:table-cell>
        </table:table-row>
        <table:table-row table:style-name="ro1">
          <table:table-cell office:value-type="string" calcext:value-type="string">
            <text:p>sqlite3_result_error_code</text:p>
          </table:table-cell>
          <table:table-cell table:number-columns-repeated="3"/>
          <table:table-cell table:formula="of:=IFERROR(VLOOKUP([.A167]; [.$D$1:.$D$63]; 1; 0); &quot;&quot;)">
            <text:p/>
          </table:table-cell>
          <table:table-cell table:formula="of:=IF(ISERROR(MATCH([.A167]; [.$D$1:.$D$63]; 0)); [.A167]; &quot;&quot;)" office:value-type="string" office:string-value="sqlite3_result_error_code" calcext:value-type="string">
            <text:p>sqlite3_result_error_code</text:p>
          </table:table-cell>
        </table:table-row>
        <table:table-row table:style-name="ro1">
          <table:table-cell office:value-type="string" calcext:value-type="string">
            <text:p>sqlite3_result_int</text:p>
          </table:table-cell>
          <table:table-cell table:number-columns-repeated="3"/>
          <table:table-cell table:formula="of:=IFERROR(VLOOKUP([.A168]; [.$D$1:.$D$63]; 1; 0); &quot;&quot;)">
            <text:p/>
          </table:table-cell>
          <table:table-cell table:formula="of:=IF(ISERROR(MATCH([.A168]; [.$D$1:.$D$63]; 0)); [.A168]; &quot;&quot;)" office:value-type="string" office:string-value="sqlite3_result_int" calcext:value-type="string">
            <text:p>sqlite3_result_int</text:p>
          </table:table-cell>
        </table:table-row>
        <table:table-row table:style-name="ro1">
          <table:table-cell office:value-type="string" calcext:value-type="string">
            <text:p>sqlite3_result_int64</text:p>
          </table:table-cell>
          <table:table-cell table:number-columns-repeated="3"/>
          <table:table-cell table:formula="of:=IFERROR(VLOOKUP([.A169]; [.$D$1:.$D$63]; 1; 0); &quot;&quot;)">
            <text:p/>
          </table:table-cell>
          <table:table-cell table:formula="of:=IF(ISERROR(MATCH([.A169]; [.$D$1:.$D$63]; 0)); [.A169]; &quot;&quot;)" office:value-type="string" office:string-value="sqlite3_result_int64" calcext:value-type="string">
            <text:p>sqlite3_result_int64</text:p>
          </table:table-cell>
        </table:table-row>
        <table:table-row table:style-name="ro1">
          <table:table-cell office:value-type="string" calcext:value-type="string">
            <text:p>sqlite3_result_null</text:p>
          </table:table-cell>
          <table:table-cell table:number-columns-repeated="3"/>
          <table:table-cell table:formula="of:=IFERROR(VLOOKUP([.A170]; [.$D$1:.$D$63]; 1; 0); &quot;&quot;)">
            <text:p/>
          </table:table-cell>
          <table:table-cell table:formula="of:=IF(ISERROR(MATCH([.A170]; [.$D$1:.$D$63]; 0)); [.A170]; &quot;&quot;)" office:value-type="string" office:string-value="sqlite3_result_null" calcext:value-type="string">
            <text:p>sqlite3_result_null</text:p>
          </table:table-cell>
        </table:table-row>
        <table:table-row table:style-name="ro1">
          <table:table-cell office:value-type="string" calcext:value-type="string">
            <text:p>sqlite3_result_text</text:p>
          </table:table-cell>
          <table:table-cell table:number-columns-repeated="3"/>
          <table:table-cell table:formula="of:=IFERROR(VLOOKUP([.A171]; [.$D$1:.$D$63]; 1; 0); &quot;&quot;)">
            <text:p/>
          </table:table-cell>
          <table:table-cell table:formula="of:=IF(ISERROR(MATCH([.A171]; [.$D$1:.$D$63]; 0)); [.A171]; &quot;&quot;)" office:value-type="string" office:string-value="sqlite3_result_text" calcext:value-type="string">
            <text:p>sqlite3_result_text</text:p>
          </table:table-cell>
        </table:table-row>
        <table:table-row table:style-name="ro1">
          <table:table-cell office:value-type="string" calcext:value-type="string">
            <text:p>sqlite3_result_text64</text:p>
          </table:table-cell>
          <table:table-cell table:number-columns-repeated="3"/>
          <table:table-cell table:formula="of:=IFERROR(VLOOKUP([.A172]; [.$D$1:.$D$63]; 1; 0); &quot;&quot;)">
            <text:p/>
          </table:table-cell>
          <table:table-cell table:formula="of:=IF(ISERROR(MATCH([.A172]; [.$D$1:.$D$63]; 0)); [.A172]; &quot;&quot;)" office:value-type="string" office:string-value="sqlite3_result_text64" calcext:value-type="string">
            <text:p>sqlite3_result_text64</text:p>
          </table:table-cell>
        </table:table-row>
        <table:table-row table:style-name="ro1">
          <table:table-cell office:value-type="string" calcext:value-type="string">
            <text:p>sqlite3_result_text16</text:p>
          </table:table-cell>
          <table:table-cell table:number-columns-repeated="3"/>
          <table:table-cell table:formula="of:=IFERROR(VLOOKUP([.A173]; [.$D$1:.$D$63]; 1; 0); &quot;&quot;)">
            <text:p/>
          </table:table-cell>
          <table:table-cell table:formula="of:=IF(ISERROR(MATCH([.A173]; [.$D$1:.$D$63]; 0)); [.A173]; &quot;&quot;)" office:value-type="string" office:string-value="sqlite3_result_text16" calcext:value-type="string">
            <text:p>sqlite3_result_text16</text:p>
          </table:table-cell>
        </table:table-row>
        <table:table-row table:style-name="ro1">
          <table:table-cell office:value-type="string" calcext:value-type="string">
            <text:p>sqlite3_result_text16le</text:p>
          </table:table-cell>
          <table:table-cell table:number-columns-repeated="3"/>
          <table:table-cell table:formula="of:=IFERROR(VLOOKUP([.A174]; [.$D$1:.$D$63]; 1; 0); &quot;&quot;)">
            <text:p/>
          </table:table-cell>
          <table:table-cell table:formula="of:=IF(ISERROR(MATCH([.A174]; [.$D$1:.$D$63]; 0)); [.A174]; &quot;&quot;)" office:value-type="string" office:string-value="sqlite3_result_text16le" calcext:value-type="string">
            <text:p>sqlite3_result_text16le</text:p>
          </table:table-cell>
        </table:table-row>
        <table:table-row table:style-name="ro1">
          <table:table-cell office:value-type="string" calcext:value-type="string">
            <text:p>sqlite3_result_text16be</text:p>
          </table:table-cell>
          <table:table-cell table:number-columns-repeated="3"/>
          <table:table-cell table:formula="of:=IFERROR(VLOOKUP([.A175]; [.$D$1:.$D$63]; 1; 0); &quot;&quot;)">
            <text:p/>
          </table:table-cell>
          <table:table-cell table:formula="of:=IF(ISERROR(MATCH([.A175]; [.$D$1:.$D$63]; 0)); [.A175]; &quot;&quot;)" office:value-type="string" office:string-value="sqlite3_result_text16be" calcext:value-type="string">
            <text:p>sqlite3_result_text16be</text:p>
          </table:table-cell>
        </table:table-row>
        <table:table-row table:style-name="ro1">
          <table:table-cell office:value-type="string" calcext:value-type="string">
            <text:p>sqlite3_result_value</text:p>
          </table:table-cell>
          <table:table-cell table:number-columns-repeated="3"/>
          <table:table-cell table:formula="of:=IFERROR(VLOOKUP([.A176]; [.$D$1:.$D$63]; 1; 0); &quot;&quot;)">
            <text:p/>
          </table:table-cell>
          <table:table-cell table:formula="of:=IF(ISERROR(MATCH([.A176]; [.$D$1:.$D$63]; 0)); [.A176]; &quot;&quot;)" office:value-type="string" office:string-value="sqlite3_result_value" calcext:value-type="string">
            <text:p>sqlite3_result_value</text:p>
          </table:table-cell>
        </table:table-row>
        <table:table-row table:style-name="ro1">
          <table:table-cell office:value-type="string" calcext:value-type="string">
            <text:p>sqlite3_result_pointer</text:p>
          </table:table-cell>
          <table:table-cell table:number-columns-repeated="3"/>
          <table:table-cell table:formula="of:=IFERROR(VLOOKUP([.A177]; [.$D$1:.$D$63]; 1; 0); &quot;&quot;)">
            <text:p/>
          </table:table-cell>
          <table:table-cell table:formula="of:=IF(ISERROR(MATCH([.A177]; [.$D$1:.$D$63]; 0)); [.A177]; &quot;&quot;)" office:value-type="string" office:string-value="sqlite3_result_pointer" calcext:value-type="string">
            <text:p>sqlite3_result_pointer</text:p>
          </table:table-cell>
        </table:table-row>
        <table:table-row table:style-name="ro1">
          <table:table-cell office:value-type="string" calcext:value-type="string">
            <text:p>sqlite3_result_zeroblob</text:p>
          </table:table-cell>
          <table:table-cell table:number-columns-repeated="3"/>
          <table:table-cell table:formula="of:=IFERROR(VLOOKUP([.A178]; [.$D$1:.$D$63]; 1; 0); &quot;&quot;)">
            <text:p/>
          </table:table-cell>
          <table:table-cell table:formula="of:=IF(ISERROR(MATCH([.A178]; [.$D$1:.$D$63]; 0)); [.A178]; &quot;&quot;)" office:value-type="string" office:string-value="sqlite3_result_zeroblob" calcext:value-type="string">
            <text:p>sqlite3_result_zeroblob</text:p>
          </table:table-cell>
        </table:table-row>
        <table:table-row table:style-name="ro1">
          <table:table-cell office:value-type="string" calcext:value-type="string">
            <text:p>sqlite3_result_zeroblob64</text:p>
          </table:table-cell>
          <table:table-cell table:number-columns-repeated="3"/>
          <table:table-cell table:formula="of:=IFERROR(VLOOKUP([.A179]; [.$D$1:.$D$63]; 1; 0); &quot;&quot;)">
            <text:p/>
          </table:table-cell>
          <table:table-cell table:formula="of:=IF(ISERROR(MATCH([.A179]; [.$D$1:.$D$63]; 0)); [.A179]; &quot;&quot;)" office:value-type="string" office:string-value="sqlite3_result_zeroblob64" calcext:value-type="string">
            <text:p>sqlite3_result_zeroblob64</text:p>
          </table:table-cell>
        </table:table-row>
        <table:table-row table:style-name="ro1">
          <table:table-cell office:value-type="string" calcext:value-type="string">
            <text:p>sqlite3_result_subtype</text:p>
          </table:table-cell>
          <table:table-cell table:number-columns-repeated="3"/>
          <table:table-cell table:formula="of:=IFERROR(VLOOKUP([.A180]; [.$D$1:.$D$63]; 1; 0); &quot;&quot;)">
            <text:p/>
          </table:table-cell>
          <table:table-cell table:formula="of:=IF(ISERROR(MATCH([.A180]; [.$D$1:.$D$63]; 0)); [.A180]; &quot;&quot;)" office:value-type="string" office:string-value="sqlite3_result_subtype" calcext:value-type="string">
            <text:p>sqlite3_result_subtype</text:p>
          </table:table-cell>
        </table:table-row>
        <table:table-row table:style-name="ro1">
          <table:table-cell office:value-type="string" calcext:value-type="string">
            <text:p>sqlite3_create_collation</text:p>
          </table:table-cell>
          <table:table-cell table:number-columns-repeated="3"/>
          <table:table-cell table:formula="of:=IFERROR(VLOOKUP([.A181]; [.$D$1:.$D$63]; 1; 0); &quot;&quot;)">
            <text:p/>
          </table:table-cell>
          <table:table-cell table:formula="of:=IF(ISERROR(MATCH([.A181]; [.$D$1:.$D$63]; 0)); [.A181]; &quot;&quot;)" office:value-type="string" office:string-value="sqlite3_create_collation" calcext:value-type="string">
            <text:p>sqlite3_create_collation</text:p>
          </table:table-cell>
        </table:table-row>
        <table:table-row table:style-name="ro1">
          <table:table-cell office:value-type="string" calcext:value-type="string">
            <text:p>sqlite3_create_collation_v2</text:p>
          </table:table-cell>
          <table:table-cell table:number-columns-repeated="3"/>
          <table:table-cell table:formula="of:=IFERROR(VLOOKUP([.A182]; [.$D$1:.$D$63]; 1; 0); &quot;&quot;)">
            <text:p/>
          </table:table-cell>
          <table:table-cell table:formula="of:=IF(ISERROR(MATCH([.A182]; [.$D$1:.$D$63]; 0)); [.A182]; &quot;&quot;)" office:value-type="string" office:string-value="sqlite3_create_collation_v2" calcext:value-type="string">
            <text:p>sqlite3_create_collation_v2</text:p>
          </table:table-cell>
        </table:table-row>
        <table:table-row table:style-name="ro1">
          <table:table-cell office:value-type="string" calcext:value-type="string">
            <text:p>sqlite3_create_collation16</text:p>
          </table:table-cell>
          <table:table-cell table:number-columns-repeated="3"/>
          <table:table-cell table:formula="of:=IFERROR(VLOOKUP([.A183]; [.$D$1:.$D$63]; 1; 0); &quot;&quot;)">
            <text:p/>
          </table:table-cell>
          <table:table-cell table:formula="of:=IF(ISERROR(MATCH([.A183]; [.$D$1:.$D$63]; 0)); [.A183]; &quot;&quot;)" office:value-type="string" office:string-value="sqlite3_create_collation16" calcext:value-type="string">
            <text:p>sqlite3_create_collation16</text:p>
          </table:table-cell>
        </table:table-row>
        <table:table-row table:style-name="ro1">
          <table:table-cell office:value-type="string" calcext:value-type="string">
            <text:p>sqlite3_collation_needed</text:p>
          </table:table-cell>
          <table:table-cell table:number-columns-repeated="3"/>
          <table:table-cell table:formula="of:=IFERROR(VLOOKUP([.A184]; [.$D$1:.$D$63]; 1; 0); &quot;&quot;)">
            <text:p/>
          </table:table-cell>
          <table:table-cell table:formula="of:=IF(ISERROR(MATCH([.A184]; [.$D$1:.$D$63]; 0)); [.A184]; &quot;&quot;)" office:value-type="string" office:string-value="sqlite3_collation_needed" calcext:value-type="string">
            <text:p>sqlite3_collation_needed</text:p>
          </table:table-cell>
        </table:table-row>
        <table:table-row table:style-name="ro1">
          <table:table-cell office:value-type="string" calcext:value-type="string">
            <text:p>sqlite3_collation_needed16</text:p>
          </table:table-cell>
          <table:table-cell table:number-columns-repeated="3"/>
          <table:table-cell table:formula="of:=IFERROR(VLOOKUP([.A185]; [.$D$1:.$D$63]; 1; 0); &quot;&quot;)">
            <text:p/>
          </table:table-cell>
          <table:table-cell table:formula="of:=IF(ISERROR(MATCH([.A185]; [.$D$1:.$D$63]; 0)); [.A185]; &quot;&quot;)" office:value-type="string" office:string-value="sqlite3_collation_needed16" calcext:value-type="string">
            <text:p>sqlite3_collation_needed16</text:p>
          </table:table-cell>
        </table:table-row>
        <table:table-row table:style-name="ro1">
          <table:table-cell office:value-type="string" calcext:value-type="string">
            <text:p>sqlite3_sleep</text:p>
          </table:table-cell>
          <table:table-cell table:number-columns-repeated="3"/>
          <table:table-cell table:formula="of:=IFERROR(VLOOKUP([.A186]; [.$D$1:.$D$63]; 1; 0); &quot;&quot;)">
            <text:p/>
          </table:table-cell>
          <table:table-cell table:formula="of:=IF(ISERROR(MATCH([.A186]; [.$D$1:.$D$63]; 0)); [.A186]; &quot;&quot;)" office:value-type="string" office:string-value="sqlite3_sleep" calcext:value-type="string">
            <text:p>sqlite3_sleep</text:p>
          </table:table-cell>
        </table:table-row>
        <table:table-row table:style-name="ro1">
          <table:table-cell office:value-type="string" calcext:value-type="string">
            <text:p>sqlite3_win32_set_directory</text:p>
          </table:table-cell>
          <table:table-cell table:number-columns-repeated="3"/>
          <table:table-cell table:formula="of:=IFERROR(VLOOKUP([.A187]; [.$D$1:.$D$63]; 1; 0); &quot;&quot;)">
            <text:p/>
          </table:table-cell>
          <table:table-cell table:formula="of:=IF(ISERROR(MATCH([.A187]; [.$D$1:.$D$63]; 0)); [.A187]; &quot;&quot;)" office:value-type="string" office:string-value="sqlite3_win32_set_directory" calcext:value-type="string">
            <text:p>sqlite3_win32_set_directory</text:p>
          </table:table-cell>
        </table:table-row>
        <table:table-row table:style-name="ro1">
          <table:table-cell office:value-type="string" calcext:value-type="string">
            <text:p>sqlite3_win32_set_directory8</text:p>
          </table:table-cell>
          <table:table-cell table:number-columns-repeated="3"/>
          <table:table-cell table:formula="of:=IFERROR(VLOOKUP([.A188]; [.$D$1:.$D$63]; 1; 0); &quot;&quot;)">
            <text:p/>
          </table:table-cell>
          <table:table-cell table:formula="of:=IF(ISERROR(MATCH([.A188]; [.$D$1:.$D$63]; 0)); [.A188]; &quot;&quot;)" office:value-type="string" office:string-value="sqlite3_win32_set_directory8" calcext:value-type="string">
            <text:p>sqlite3_win32_set_directory8</text:p>
          </table:table-cell>
        </table:table-row>
        <table:table-row table:style-name="ro1">
          <table:table-cell office:value-type="string" calcext:value-type="string">
            <text:p>sqlite3_win32_set_directory16</text:p>
          </table:table-cell>
          <table:table-cell table:number-columns-repeated="3"/>
          <table:table-cell table:formula="of:=IFERROR(VLOOKUP([.A189]; [.$D$1:.$D$63]; 1; 0); &quot;&quot;)">
            <text:p/>
          </table:table-cell>
          <table:table-cell table:formula="of:=IF(ISERROR(MATCH([.A189]; [.$D$1:.$D$63]; 0)); [.A189]; &quot;&quot;)" office:value-type="string" office:string-value="sqlite3_win32_set_directory16" calcext:value-type="string">
            <text:p>sqlite3_win32_set_directory16</text:p>
          </table:table-cell>
        </table:table-row>
        <table:table-row table:style-name="ro1">
          <table:table-cell office:value-type="string" calcext:value-type="string">
            <text:p>sqlite3_get_autocommit</text:p>
          </table:table-cell>
          <table:table-cell table:number-columns-repeated="3"/>
          <table:table-cell table:formula="of:=IFERROR(VLOOKUP([.A190]; [.$D$1:.$D$63]; 1; 0); &quot;&quot;)" office:value-type="string" office:string-value="sqlite3_get_autocommit" calcext:value-type="string">
            <text:p>sqlite3_get_autocommit</text:p>
          </table:table-cell>
          <table:table-cell table:formula="of:=IF(ISERROR(MATCH([.A190]; [.$D$1:.$D$63]; 0)); [.A190]; &quot;&quot;)">
            <text:p/>
          </table:table-cell>
        </table:table-row>
        <table:table-row table:style-name="ro1">
          <table:table-cell office:value-type="string" calcext:value-type="string">
            <text:p>sqlite3_db_handle</text:p>
          </table:table-cell>
          <table:table-cell table:number-columns-repeated="3"/>
          <table:table-cell table:formula="of:=IFERROR(VLOOKUP([.A191]; [.$D$1:.$D$63]; 1; 0); &quot;&quot;)">
            <text:p/>
          </table:table-cell>
          <table:table-cell table:formula="of:=IF(ISERROR(MATCH([.A191]; [.$D$1:.$D$63]; 0)); [.A191]; &quot;&quot;)" office:value-type="string" office:string-value="sqlite3_db_handle" calcext:value-type="string">
            <text:p>sqlite3_db_handle</text:p>
          </table:table-cell>
        </table:table-row>
        <table:table-row table:style-name="ro1">
          <table:table-cell office:value-type="string" calcext:value-type="string">
            <text:p>sqlite3_db_name</text:p>
          </table:table-cell>
          <table:table-cell table:number-columns-repeated="3"/>
          <table:table-cell table:formula="of:=IFERROR(VLOOKUP([.A192]; [.$D$1:.$D$63]; 1; 0); &quot;&quot;)">
            <text:p/>
          </table:table-cell>
          <table:table-cell table:formula="of:=IF(ISERROR(MATCH([.A192]; [.$D$1:.$D$63]; 0)); [.A192]; &quot;&quot;)" office:value-type="string" office:string-value="sqlite3_db_name" calcext:value-type="string">
            <text:p>sqlite3_db_name</text:p>
          </table:table-cell>
        </table:table-row>
        <table:table-row table:style-name="ro1">
          <table:table-cell office:value-type="string" calcext:value-type="string">
            <text:p>sqlite3_db_filename</text:p>
          </table:table-cell>
          <table:table-cell table:number-columns-repeated="3"/>
          <table:table-cell table:formula="of:=IFERROR(VLOOKUP([.A193]; [.$D$1:.$D$63]; 1; 0); &quot;&quot;)">
            <text:p/>
          </table:table-cell>
          <table:table-cell table:formula="of:=IF(ISERROR(MATCH([.A193]; [.$D$1:.$D$63]; 0)); [.A193]; &quot;&quot;)" office:value-type="string" office:string-value="sqlite3_db_filename" calcext:value-type="string">
            <text:p>sqlite3_db_filename</text:p>
          </table:table-cell>
        </table:table-row>
        <table:table-row table:style-name="ro1">
          <table:table-cell office:value-type="string" calcext:value-type="string">
            <text:p>sqlite3_db_readonly</text:p>
          </table:table-cell>
          <table:table-cell table:number-columns-repeated="3"/>
          <table:table-cell table:formula="of:=IFERROR(VLOOKUP([.A194]; [.$D$1:.$D$63]; 1; 0); &quot;&quot;)" office:value-type="string" office:string-value="sqlite3_db_readonly" calcext:value-type="string">
            <text:p>sqlite3_db_readonly</text:p>
          </table:table-cell>
          <table:table-cell table:formula="of:=IF(ISERROR(MATCH([.A194]; [.$D$1:.$D$63]; 0)); [.A194]; &quot;&quot;)">
            <text:p/>
          </table:table-cell>
        </table:table-row>
        <table:table-row table:style-name="ro1">
          <table:table-cell office:value-type="string" calcext:value-type="string">
            <text:p>sqlite3_txn_state</text:p>
          </table:table-cell>
          <table:table-cell table:number-columns-repeated="3"/>
          <table:table-cell table:formula="of:=IFERROR(VLOOKUP([.A195]; [.$D$1:.$D$63]; 1; 0); &quot;&quot;)" office:value-type="string" office:string-value="sqlite3_txn_state" calcext:value-type="string">
            <text:p>sqlite3_txn_state</text:p>
          </table:table-cell>
          <table:table-cell table:formula="of:=IF(ISERROR(MATCH([.A195]; [.$D$1:.$D$63]; 0)); [.A195]; &quot;&quot;)">
            <text:p/>
          </table:table-cell>
        </table:table-row>
        <table:table-row table:style-name="ro1">
          <table:table-cell office:value-type="string" calcext:value-type="string">
            <text:p>sqlite3_next_stmt</text:p>
          </table:table-cell>
          <table:table-cell table:number-columns-repeated="3"/>
          <table:table-cell table:formula="of:=IFERROR(VLOOKUP([.A196]; [.$D$1:.$D$63]; 1; 0); &quot;&quot;)">
            <text:p/>
          </table:table-cell>
          <table:table-cell table:formula="of:=IF(ISERROR(MATCH([.A196]; [.$D$1:.$D$63]; 0)); [.A196]; &quot;&quot;)" office:value-type="string" office:string-value="sqlite3_next_stmt" calcext:value-type="string">
            <text:p>sqlite3_next_stmt</text:p>
          </table:table-cell>
        </table:table-row>
        <table:table-row table:style-name="ro1">
          <table:table-cell office:value-type="string" calcext:value-type="string">
            <text:p>sqlite3_commit_hook</text:p>
          </table:table-cell>
          <table:table-cell table:number-columns-repeated="3"/>
          <table:table-cell table:formula="of:=IFERROR(VLOOKUP([.A197]; [.$D$1:.$D$63]; 1; 0); &quot;&quot;)">
            <text:p/>
          </table:table-cell>
          <table:table-cell table:formula="of:=IF(ISERROR(MATCH([.A197]; [.$D$1:.$D$63]; 0)); [.A197]; &quot;&quot;)" office:value-type="string" office:string-value="sqlite3_commit_hook" calcext:value-type="string">
            <text:p>sqlite3_commit_hook</text:p>
          </table:table-cell>
        </table:table-row>
        <table:table-row table:style-name="ro1">
          <table:table-cell office:value-type="string" calcext:value-type="string">
            <text:p>sqlite3_rollback_hook</text:p>
          </table:table-cell>
          <table:table-cell table:number-columns-repeated="3"/>
          <table:table-cell table:formula="of:=IFERROR(VLOOKUP([.A198]; [.$D$1:.$D$63]; 1; 0); &quot;&quot;)">
            <text:p/>
          </table:table-cell>
          <table:table-cell table:formula="of:=IF(ISERROR(MATCH([.A198]; [.$D$1:.$D$63]; 0)); [.A198]; &quot;&quot;)" office:value-type="string" office:string-value="sqlite3_rollback_hook" calcext:value-type="string">
            <text:p>sqlite3_rollback_hook</text:p>
          </table:table-cell>
        </table:table-row>
        <table:table-row table:style-name="ro1">
          <table:table-cell office:value-type="string" calcext:value-type="string">
            <text:p>sqlite3_autovacuum_pages</text:p>
          </table:table-cell>
          <table:table-cell table:number-columns-repeated="3"/>
          <table:table-cell table:formula="of:=IFERROR(VLOOKUP([.A199]; [.$D$1:.$D$63]; 1; 0); &quot;&quot;)">
            <text:p/>
          </table:table-cell>
          <table:table-cell table:formula="of:=IF(ISERROR(MATCH([.A199]; [.$D$1:.$D$63]; 0)); [.A199]; &quot;&quot;)" office:value-type="string" office:string-value="sqlite3_autovacuum_pages" calcext:value-type="string">
            <text:p>sqlite3_autovacuum_pages</text:p>
          </table:table-cell>
        </table:table-row>
        <table:table-row table:style-name="ro1">
          <table:table-cell office:value-type="string" calcext:value-type="string">
            <text:p>sqlite3_update_hook</text:p>
          </table:table-cell>
          <table:table-cell table:number-columns-repeated="3"/>
          <table:table-cell table:formula="of:=IFERROR(VLOOKUP([.A200]; [.$D$1:.$D$63]; 1; 0); &quot;&quot;)">
            <text:p/>
          </table:table-cell>
          <table:table-cell table:formula="of:=IF(ISERROR(MATCH([.A200]; [.$D$1:.$D$63]; 0)); [.A200]; &quot;&quot;)" office:value-type="string" office:string-value="sqlite3_update_hook" calcext:value-type="string">
            <text:p>sqlite3_update_hook</text:p>
          </table:table-cell>
        </table:table-row>
        <table:table-row table:style-name="ro1">
          <table:table-cell office:value-type="string" calcext:value-type="string">
            <text:p>sqlite3_enable_shared_cache</text:p>
          </table:table-cell>
          <table:table-cell table:number-columns-repeated="3"/>
          <table:table-cell table:formula="of:=IFERROR(VLOOKUP([.A201]; [.$D$1:.$D$63]; 1; 0); &quot;&quot;)">
            <text:p/>
          </table:table-cell>
          <table:table-cell table:formula="of:=IF(ISERROR(MATCH([.A201]; [.$D$1:.$D$63]; 0)); [.A201]; &quot;&quot;)" office:value-type="string" office:string-value="sqlite3_enable_shared_cache" calcext:value-type="string">
            <text:p>sqlite3_enable_shared_cache</text:p>
          </table:table-cell>
        </table:table-row>
        <table:table-row table:style-name="ro1">
          <table:table-cell office:value-type="string" calcext:value-type="string">
            <text:p>sqlite3_release_memory</text:p>
          </table:table-cell>
          <table:table-cell table:number-columns-repeated="3"/>
          <table:table-cell table:formula="of:=IFERROR(VLOOKUP([.A202]; [.$D$1:.$D$63]; 1; 0); &quot;&quot;)">
            <text:p/>
          </table:table-cell>
          <table:table-cell table:formula="of:=IF(ISERROR(MATCH([.A202]; [.$D$1:.$D$63]; 0)); [.A202]; &quot;&quot;)" office:value-type="string" office:string-value="sqlite3_release_memory" calcext:value-type="string">
            <text:p>sqlite3_release_memory</text:p>
          </table:table-cell>
        </table:table-row>
        <table:table-row table:style-name="ro1">
          <table:table-cell office:value-type="string" calcext:value-type="string">
            <text:p>sqlite3_db_release_memory</text:p>
          </table:table-cell>
          <table:table-cell table:number-columns-repeated="3"/>
          <table:table-cell table:formula="of:=IFERROR(VLOOKUP([.A203]; [.$D$1:.$D$63]; 1; 0); &quot;&quot;)">
            <text:p/>
          </table:table-cell>
          <table:table-cell table:formula="of:=IF(ISERROR(MATCH([.A203]; [.$D$1:.$D$63]; 0)); [.A203]; &quot;&quot;)" office:value-type="string" office:string-value="sqlite3_db_release_memory" calcext:value-type="string">
            <text:p>sqlite3_db_release_memory</text:p>
          </table:table-cell>
        </table:table-row>
        <table:table-row table:style-name="ro1">
          <table:table-cell office:value-type="string" calcext:value-type="string">
            <text:p>sqlite3_soft_heap_limit64</text:p>
          </table:table-cell>
          <table:table-cell table:number-columns-repeated="3"/>
          <table:table-cell table:formula="of:=IFERROR(VLOOKUP([.A204]; [.$D$1:.$D$63]; 1; 0); &quot;&quot;)">
            <text:p/>
          </table:table-cell>
          <table:table-cell table:formula="of:=IF(ISERROR(MATCH([.A204]; [.$D$1:.$D$63]; 0)); [.A204]; &quot;&quot;)" office:value-type="string" office:string-value="sqlite3_soft_heap_limit64" calcext:value-type="string">
            <text:p>sqlite3_soft_heap_limit64</text:p>
          </table:table-cell>
        </table:table-row>
        <table:table-row table:style-name="ro1">
          <table:table-cell office:value-type="string" calcext:value-type="string">
            <text:p>sqlite3_hard_heap_limit64</text:p>
          </table:table-cell>
          <table:table-cell table:number-columns-repeated="3"/>
          <table:table-cell table:formula="of:=IFERROR(VLOOKUP([.A205]; [.$D$1:.$D$63]; 1; 0); &quot;&quot;)">
            <text:p/>
          </table:table-cell>
          <table:table-cell table:formula="of:=IF(ISERROR(MATCH([.A205]; [.$D$1:.$D$63]; 0)); [.A205]; &quot;&quot;)" office:value-type="string" office:string-value="sqlite3_hard_heap_limit64" calcext:value-type="string">
            <text:p>sqlite3_hard_heap_limit64</text:p>
          </table:table-cell>
        </table:table-row>
        <table:table-row table:style-name="ro1">
          <table:table-cell office:value-type="string" calcext:value-type="string">
            <text:p>sqlite3_soft_heap_limit</text:p>
          </table:table-cell>
          <table:table-cell table:number-columns-repeated="3"/>
          <table:table-cell table:formula="of:=IFERROR(VLOOKUP([.A206]; [.$D$1:.$D$63]; 1; 0); &quot;&quot;)">
            <text:p/>
          </table:table-cell>
          <table:table-cell table:formula="of:=IF(ISERROR(MATCH([.A206]; [.$D$1:.$D$63]; 0)); [.A206]; &quot;&quot;)" office:value-type="string" office:string-value="sqlite3_soft_heap_limit" calcext:value-type="string">
            <text:p>sqlite3_soft_heap_limit</text:p>
          </table:table-cell>
        </table:table-row>
        <table:table-row table:style-name="ro1">
          <table:table-cell office:value-type="string" calcext:value-type="string">
            <text:p>sqlite3_table_column_metadata</text:p>
          </table:table-cell>
          <table:table-cell table:number-columns-repeated="3"/>
          <table:table-cell table:formula="of:=IFERROR(VLOOKUP([.A207]; [.$D$1:.$D$63]; 1; 0); &quot;&quot;)" office:value-type="string" office:string-value="sqlite3_table_column_metadata" calcext:value-type="string">
            <text:p>sqlite3_table_column_metadata</text:p>
          </table:table-cell>
          <table:table-cell table:formula="of:=IF(ISERROR(MATCH([.A207]; [.$D$1:.$D$63]; 0)); [.A207]; &quot;&quot;)">
            <text:p/>
          </table:table-cell>
        </table:table-row>
        <table:table-row table:style-name="ro1">
          <table:table-cell office:value-type="string" calcext:value-type="string">
            <text:p>sqlite3_load_extension</text:p>
          </table:table-cell>
          <table:table-cell table:number-columns-repeated="3"/>
          <table:table-cell table:formula="of:=IFERROR(VLOOKUP([.A208]; [.$D$1:.$D$63]; 1; 0); &quot;&quot;)">
            <text:p/>
          </table:table-cell>
          <table:table-cell table:formula="of:=IF(ISERROR(MATCH([.A208]; [.$D$1:.$D$63]; 0)); [.A208]; &quot;&quot;)" office:value-type="string" office:string-value="sqlite3_load_extension" calcext:value-type="string">
            <text:p>sqlite3_load_extension</text:p>
          </table:table-cell>
        </table:table-row>
        <table:table-row table:style-name="ro1">
          <table:table-cell office:value-type="string" calcext:value-type="string">
            <text:p>sqlite3_enable_load_extension</text:p>
          </table:table-cell>
          <table:table-cell table:number-columns-repeated="3"/>
          <table:table-cell table:formula="of:=IFERROR(VLOOKUP([.A209]; [.$D$1:.$D$63]; 1; 0); &quot;&quot;)">
            <text:p/>
          </table:table-cell>
          <table:table-cell table:formula="of:=IF(ISERROR(MATCH([.A209]; [.$D$1:.$D$63]; 0)); [.A209]; &quot;&quot;)" office:value-type="string" office:string-value="sqlite3_enable_load_extension" calcext:value-type="string">
            <text:p>sqlite3_enable_load_extension</text:p>
          </table:table-cell>
        </table:table-row>
        <table:table-row table:style-name="ro1">
          <table:table-cell office:value-type="string" calcext:value-type="string">
            <text:p>sqlite3_auto_extension</text:p>
          </table:table-cell>
          <table:table-cell table:number-columns-repeated="3"/>
          <table:table-cell table:formula="of:=IFERROR(VLOOKUP([.A210]; [.$D$1:.$D$63]; 1; 0); &quot;&quot;)">
            <text:p/>
          </table:table-cell>
          <table:table-cell table:formula="of:=IF(ISERROR(MATCH([.A210]; [.$D$1:.$D$63]; 0)); [.A210]; &quot;&quot;)" office:value-type="string" office:string-value="sqlite3_auto_extension" calcext:value-type="string">
            <text:p>sqlite3_auto_extension</text:p>
          </table:table-cell>
        </table:table-row>
        <table:table-row table:style-name="ro1">
          <table:table-cell office:value-type="string" calcext:value-type="string">
            <text:p>sqlite3_cancel_auto_extension</text:p>
          </table:table-cell>
          <table:table-cell table:number-columns-repeated="3"/>
          <table:table-cell table:formula="of:=IFERROR(VLOOKUP([.A211]; [.$D$1:.$D$63]; 1; 0); &quot;&quot;)">
            <text:p/>
          </table:table-cell>
          <table:table-cell table:formula="of:=IF(ISERROR(MATCH([.A211]; [.$D$1:.$D$63]; 0)); [.A211]; &quot;&quot;)" office:value-type="string" office:string-value="sqlite3_cancel_auto_extension" calcext:value-type="string">
            <text:p>sqlite3_cancel_auto_extension</text:p>
          </table:table-cell>
        </table:table-row>
        <table:table-row table:style-name="ro1">
          <table:table-cell office:value-type="string" calcext:value-type="string">
            <text:p>sqlite3_reset_auto_extension</text:p>
          </table:table-cell>
          <table:table-cell table:number-columns-repeated="3"/>
          <table:table-cell table:formula="of:=IFERROR(VLOOKUP([.A212]; [.$D$1:.$D$63]; 1; 0); &quot;&quot;)">
            <text:p/>
          </table:table-cell>
          <table:table-cell table:formula="of:=IF(ISERROR(MATCH([.A212]; [.$D$1:.$D$63]; 0)); [.A212]; &quot;&quot;)" office:value-type="string" office:string-value="sqlite3_reset_auto_extension" calcext:value-type="string">
            <text:p>sqlite3_reset_auto_extension</text:p>
          </table:table-cell>
        </table:table-row>
        <table:table-row table:style-name="ro1">
          <table:table-cell office:value-type="string" calcext:value-type="string">
            <text:p>sqlite3_create_module</text:p>
          </table:table-cell>
          <table:table-cell table:number-columns-repeated="3"/>
          <table:table-cell table:formula="of:=IFERROR(VLOOKUP([.A213]; [.$D$1:.$D$63]; 1; 0); &quot;&quot;)">
            <text:p/>
          </table:table-cell>
          <table:table-cell table:formula="of:=IF(ISERROR(MATCH([.A213]; [.$D$1:.$D$63]; 0)); [.A213]; &quot;&quot;)" office:value-type="string" office:string-value="sqlite3_create_module" calcext:value-type="string">
            <text:p>sqlite3_create_module</text:p>
          </table:table-cell>
        </table:table-row>
        <table:table-row table:style-name="ro1">
          <table:table-cell office:value-type="string" calcext:value-type="string">
            <text:p>sqlite3_create_module_v2</text:p>
          </table:table-cell>
          <table:table-cell table:number-columns-repeated="3"/>
          <table:table-cell table:formula="of:=IFERROR(VLOOKUP([.A214]; [.$D$1:.$D$63]; 1; 0); &quot;&quot;)">
            <text:p/>
          </table:table-cell>
          <table:table-cell table:formula="of:=IF(ISERROR(MATCH([.A214]; [.$D$1:.$D$63]; 0)); [.A214]; &quot;&quot;)" office:value-type="string" office:string-value="sqlite3_create_module_v2" calcext:value-type="string">
            <text:p>sqlite3_create_module_v2</text:p>
          </table:table-cell>
        </table:table-row>
        <table:table-row table:style-name="ro1">
          <table:table-cell office:value-type="string" calcext:value-type="string">
            <text:p>sqlite3_drop_modules</text:p>
          </table:table-cell>
          <table:table-cell table:number-columns-repeated="3"/>
          <table:table-cell table:formula="of:=IFERROR(VLOOKUP([.A215]; [.$D$1:.$D$63]; 1; 0); &quot;&quot;)">
            <text:p/>
          </table:table-cell>
          <table:table-cell table:formula="of:=IF(ISERROR(MATCH([.A215]; [.$D$1:.$D$63]; 0)); [.A215]; &quot;&quot;)" office:value-type="string" office:string-value="sqlite3_drop_modules" calcext:value-type="string">
            <text:p>sqlite3_drop_modules</text:p>
          </table:table-cell>
        </table:table-row>
        <table:table-row table:style-name="ro1">
          <table:table-cell office:value-type="string" calcext:value-type="string">
            <text:p>sqlite3_declare_vtab</text:p>
          </table:table-cell>
          <table:table-cell table:number-columns-repeated="3"/>
          <table:table-cell table:formula="of:=IFERROR(VLOOKUP([.A216]; [.$D$1:.$D$63]; 1; 0); &quot;&quot;)">
            <text:p/>
          </table:table-cell>
          <table:table-cell table:formula="of:=IF(ISERROR(MATCH([.A216]; [.$D$1:.$D$63]; 0)); [.A216]; &quot;&quot;)" office:value-type="string" office:string-value="sqlite3_declare_vtab" calcext:value-type="string">
            <text:p>sqlite3_declare_vtab</text:p>
          </table:table-cell>
        </table:table-row>
        <table:table-row table:style-name="ro1">
          <table:table-cell office:value-type="string" calcext:value-type="string">
            <text:p>sqlite3_overload_function</text:p>
          </table:table-cell>
          <table:table-cell table:number-columns-repeated="3"/>
          <table:table-cell table:formula="of:=IFERROR(VLOOKUP([.A217]; [.$D$1:.$D$63]; 1; 0); &quot;&quot;)">
            <text:p/>
          </table:table-cell>
          <table:table-cell table:formula="of:=IF(ISERROR(MATCH([.A217]; [.$D$1:.$D$63]; 0)); [.A217]; &quot;&quot;)" office:value-type="string" office:string-value="sqlite3_overload_function" calcext:value-type="string">
            <text:p>sqlite3_overload_function</text:p>
          </table:table-cell>
        </table:table-row>
        <table:table-row table:style-name="ro1">
          <table:table-cell office:value-type="string" calcext:value-type="string">
            <text:p>sqlite3_blob_open</text:p>
          </table:table-cell>
          <table:table-cell table:number-columns-repeated="3"/>
          <table:table-cell table:formula="of:=IFERROR(VLOOKUP([.A218]; [.$D$1:.$D$63]; 1; 0); &quot;&quot;)">
            <text:p/>
          </table:table-cell>
          <table:table-cell table:formula="of:=IF(ISERROR(MATCH([.A218]; [.$D$1:.$D$63]; 0)); [.A218]; &quot;&quot;)" office:value-type="string" office:string-value="sqlite3_blob_open" calcext:value-type="string">
            <text:p>sqlite3_blob_open</text:p>
          </table:table-cell>
        </table:table-row>
        <table:table-row table:style-name="ro1">
          <table:table-cell office:value-type="string" calcext:value-type="string">
            <text:p>sqlite3_blob_reopen</text:p>
          </table:table-cell>
          <table:table-cell table:number-columns-repeated="3"/>
          <table:table-cell table:formula="of:=IFERROR(VLOOKUP([.A219]; [.$D$1:.$D$63]; 1; 0); &quot;&quot;)">
            <text:p/>
          </table:table-cell>
          <table:table-cell table:formula="of:=IF(ISERROR(MATCH([.A219]; [.$D$1:.$D$63]; 0)); [.A219]; &quot;&quot;)" office:value-type="string" office:string-value="sqlite3_blob_reopen" calcext:value-type="string">
            <text:p>sqlite3_blob_reopen</text:p>
          </table:table-cell>
        </table:table-row>
        <table:table-row table:style-name="ro1">
          <table:table-cell office:value-type="string" calcext:value-type="string">
            <text:p>sqlite3_blob_close</text:p>
          </table:table-cell>
          <table:table-cell table:number-columns-repeated="3"/>
          <table:table-cell table:formula="of:=IFERROR(VLOOKUP([.A220]; [.$D$1:.$D$63]; 1; 0); &quot;&quot;)">
            <text:p/>
          </table:table-cell>
          <table:table-cell table:formula="of:=IF(ISERROR(MATCH([.A220]; [.$D$1:.$D$63]; 0)); [.A220]; &quot;&quot;)" office:value-type="string" office:string-value="sqlite3_blob_close" calcext:value-type="string">
            <text:p>sqlite3_blob_close</text:p>
          </table:table-cell>
        </table:table-row>
        <table:table-row table:style-name="ro1">
          <table:table-cell office:value-type="string" calcext:value-type="string">
            <text:p>sqlite3_blob_bytes</text:p>
          </table:table-cell>
          <table:table-cell table:number-columns-repeated="3"/>
          <table:table-cell table:formula="of:=IFERROR(VLOOKUP([.A221]; [.$D$1:.$D$63]; 1; 0); &quot;&quot;)">
            <text:p/>
          </table:table-cell>
          <table:table-cell table:formula="of:=IF(ISERROR(MATCH([.A221]; [.$D$1:.$D$63]; 0)); [.A221]; &quot;&quot;)" office:value-type="string" office:string-value="sqlite3_blob_bytes" calcext:value-type="string">
            <text:p>sqlite3_blob_bytes</text:p>
          </table:table-cell>
        </table:table-row>
        <table:table-row table:style-name="ro1">
          <table:table-cell office:value-type="string" calcext:value-type="string">
            <text:p>sqlite3_blob_read</text:p>
          </table:table-cell>
          <table:table-cell table:number-columns-repeated="3"/>
          <table:table-cell table:formula="of:=IFERROR(VLOOKUP([.A222]; [.$D$1:.$D$63]; 1; 0); &quot;&quot;)">
            <text:p/>
          </table:table-cell>
          <table:table-cell table:formula="of:=IF(ISERROR(MATCH([.A222]; [.$D$1:.$D$63]; 0)); [.A222]; &quot;&quot;)" office:value-type="string" office:string-value="sqlite3_blob_read" calcext:value-type="string">
            <text:p>sqlite3_blob_read</text:p>
          </table:table-cell>
        </table:table-row>
        <table:table-row table:style-name="ro1">
          <table:table-cell office:value-type="string" calcext:value-type="string">
            <text:p>sqlite3_blob_write</text:p>
          </table:table-cell>
          <table:table-cell table:number-columns-repeated="3"/>
          <table:table-cell table:formula="of:=IFERROR(VLOOKUP([.A223]; [.$D$1:.$D$63]; 1; 0); &quot;&quot;)">
            <text:p/>
          </table:table-cell>
          <table:table-cell table:formula="of:=IF(ISERROR(MATCH([.A223]; [.$D$1:.$D$63]; 0)); [.A223]; &quot;&quot;)" office:value-type="string" office:string-value="sqlite3_blob_write" calcext:value-type="string">
            <text:p>sqlite3_blob_write</text:p>
          </table:table-cell>
        </table:table-row>
        <table:table-row table:style-name="ro1">
          <table:table-cell office:value-type="string" calcext:value-type="string">
            <text:p>sqlite3_vfs_find</text:p>
          </table:table-cell>
          <table:table-cell table:number-columns-repeated="3"/>
          <table:table-cell table:formula="of:=IFERROR(VLOOKUP([.A224]; [.$D$1:.$D$63]; 1; 0); &quot;&quot;)">
            <text:p/>
          </table:table-cell>
          <table:table-cell table:formula="of:=IF(ISERROR(MATCH([.A224]; [.$D$1:.$D$63]; 0)); [.A224]; &quot;&quot;)" office:value-type="string" office:string-value="sqlite3_vfs_find" calcext:value-type="string">
            <text:p>sqlite3_vfs_find</text:p>
          </table:table-cell>
        </table:table-row>
        <table:table-row table:style-name="ro1">
          <table:table-cell office:value-type="string" calcext:value-type="string">
            <text:p>sqlite3_vfs_register</text:p>
          </table:table-cell>
          <table:table-cell table:number-columns-repeated="3"/>
          <table:table-cell table:formula="of:=IFERROR(VLOOKUP([.A225]; [.$D$1:.$D$63]; 1; 0); &quot;&quot;)">
            <text:p/>
          </table:table-cell>
          <table:table-cell table:formula="of:=IF(ISERROR(MATCH([.A225]; [.$D$1:.$D$63]; 0)); [.A225]; &quot;&quot;)" office:value-type="string" office:string-value="sqlite3_vfs_register" calcext:value-type="string">
            <text:p>sqlite3_vfs_register</text:p>
          </table:table-cell>
        </table:table-row>
        <table:table-row table:style-name="ro1">
          <table:table-cell office:value-type="string" calcext:value-type="string">
            <text:p>sqlite3_vfs_unregister</text:p>
          </table:table-cell>
          <table:table-cell table:number-columns-repeated="3"/>
          <table:table-cell table:formula="of:=IFERROR(VLOOKUP([.A226]; [.$D$1:.$D$63]; 1; 0); &quot;&quot;)">
            <text:p/>
          </table:table-cell>
          <table:table-cell table:formula="of:=IF(ISERROR(MATCH([.A226]; [.$D$1:.$D$63]; 0)); [.A226]; &quot;&quot;)" office:value-type="string" office:string-value="sqlite3_vfs_unregister" calcext:value-type="string">
            <text:p>sqlite3_vfs_unregister</text:p>
          </table:table-cell>
        </table:table-row>
        <table:table-row table:style-name="ro1">
          <table:table-cell office:value-type="string" calcext:value-type="string">
            <text:p>sqlite3_mutex_alloc</text:p>
          </table:table-cell>
          <table:table-cell table:number-columns-repeated="3"/>
          <table:table-cell table:formula="of:=IFERROR(VLOOKUP([.A227]; [.$D$1:.$D$63]; 1; 0); &quot;&quot;)">
            <text:p/>
          </table:table-cell>
          <table:table-cell table:formula="of:=IF(ISERROR(MATCH([.A227]; [.$D$1:.$D$63]; 0)); [.A227]; &quot;&quot;)" office:value-type="string" office:string-value="sqlite3_mutex_alloc" calcext:value-type="string">
            <text:p>sqlite3_mutex_alloc</text:p>
          </table:table-cell>
        </table:table-row>
        <table:table-row table:style-name="ro1">
          <table:table-cell office:value-type="string" calcext:value-type="string">
            <text:p>sqlite3_mutex_free</text:p>
          </table:table-cell>
          <table:table-cell table:number-columns-repeated="3"/>
          <table:table-cell table:formula="of:=IFERROR(VLOOKUP([.A228]; [.$D$1:.$D$63]; 1; 0); &quot;&quot;)">
            <text:p/>
          </table:table-cell>
          <table:table-cell table:formula="of:=IF(ISERROR(MATCH([.A228]; [.$D$1:.$D$63]; 0)); [.A228]; &quot;&quot;)" office:value-type="string" office:string-value="sqlite3_mutex_free" calcext:value-type="string">
            <text:p>sqlite3_mutex_free</text:p>
          </table:table-cell>
        </table:table-row>
        <table:table-row table:style-name="ro1">
          <table:table-cell office:value-type="string" calcext:value-type="string">
            <text:p>sqlite3_mutex_enter</text:p>
          </table:table-cell>
          <table:table-cell table:number-columns-repeated="3"/>
          <table:table-cell table:formula="of:=IFERROR(VLOOKUP([.A229]; [.$D$1:.$D$63]; 1; 0); &quot;&quot;)">
            <text:p/>
          </table:table-cell>
          <table:table-cell table:formula="of:=IF(ISERROR(MATCH([.A229]; [.$D$1:.$D$63]; 0)); [.A229]; &quot;&quot;)" office:value-type="string" office:string-value="sqlite3_mutex_enter" calcext:value-type="string">
            <text:p>sqlite3_mutex_enter</text:p>
          </table:table-cell>
        </table:table-row>
        <table:table-row table:style-name="ro1">
          <table:table-cell office:value-type="string" calcext:value-type="string">
            <text:p>sqlite3_mutex_try</text:p>
          </table:table-cell>
          <table:table-cell table:number-columns-repeated="3"/>
          <table:table-cell table:formula="of:=IFERROR(VLOOKUP([.A230]; [.$D$1:.$D$63]; 1; 0); &quot;&quot;)">
            <text:p/>
          </table:table-cell>
          <table:table-cell table:formula="of:=IF(ISERROR(MATCH([.A230]; [.$D$1:.$D$63]; 0)); [.A230]; &quot;&quot;)" office:value-type="string" office:string-value="sqlite3_mutex_try" calcext:value-type="string">
            <text:p>sqlite3_mutex_try</text:p>
          </table:table-cell>
        </table:table-row>
        <table:table-row table:style-name="ro1">
          <table:table-cell office:value-type="string" calcext:value-type="string">
            <text:p>sqlite3_mutex_leave</text:p>
          </table:table-cell>
          <table:table-cell table:number-columns-repeated="3"/>
          <table:table-cell table:formula="of:=IFERROR(VLOOKUP([.A231]; [.$D$1:.$D$63]; 1; 0); &quot;&quot;)">
            <text:p/>
          </table:table-cell>
          <table:table-cell table:formula="of:=IF(ISERROR(MATCH([.A231]; [.$D$1:.$D$63]; 0)); [.A231]; &quot;&quot;)" office:value-type="string" office:string-value="sqlite3_mutex_leave" calcext:value-type="string">
            <text:p>sqlite3_mutex_leave</text:p>
          </table:table-cell>
        </table:table-row>
        <table:table-row table:style-name="ro1">
          <table:table-cell office:value-type="string" calcext:value-type="string">
            <text:p>sqlite3_mutex_held</text:p>
          </table:table-cell>
          <table:table-cell table:number-columns-repeated="3"/>
          <table:table-cell table:formula="of:=IFERROR(VLOOKUP([.A232]; [.$D$1:.$D$63]; 1; 0); &quot;&quot;)">
            <text:p/>
          </table:table-cell>
          <table:table-cell table:formula="of:=IF(ISERROR(MATCH([.A232]; [.$D$1:.$D$63]; 0)); [.A232]; &quot;&quot;)" office:value-type="string" office:string-value="sqlite3_mutex_held" calcext:value-type="string">
            <text:p>sqlite3_mutex_held</text:p>
          </table:table-cell>
        </table:table-row>
        <table:table-row table:style-name="ro1">
          <table:table-cell office:value-type="string" calcext:value-type="string">
            <text:p>sqlite3_mutex_notheld</text:p>
          </table:table-cell>
          <table:table-cell table:number-columns-repeated="3"/>
          <table:table-cell table:formula="of:=IFERROR(VLOOKUP([.A233]; [.$D$1:.$D$63]; 1; 0); &quot;&quot;)">
            <text:p/>
          </table:table-cell>
          <table:table-cell table:formula="of:=IF(ISERROR(MATCH([.A233]; [.$D$1:.$D$63]; 0)); [.A233]; &quot;&quot;)" office:value-type="string" office:string-value="sqlite3_mutex_notheld" calcext:value-type="string">
            <text:p>sqlite3_mutex_notheld</text:p>
          </table:table-cell>
        </table:table-row>
        <table:table-row table:style-name="ro1">
          <table:table-cell office:value-type="string" calcext:value-type="string">
            <text:p>sqlite3_db_mutex</text:p>
          </table:table-cell>
          <table:table-cell table:number-columns-repeated="3"/>
          <table:table-cell table:formula="of:=IFERROR(VLOOKUP([.A234]; [.$D$1:.$D$63]; 1; 0); &quot;&quot;)">
            <text:p/>
          </table:table-cell>
          <table:table-cell table:formula="of:=IF(ISERROR(MATCH([.A234]; [.$D$1:.$D$63]; 0)); [.A234]; &quot;&quot;)" office:value-type="string" office:string-value="sqlite3_db_mutex" calcext:value-type="string">
            <text:p>sqlite3_db_mutex</text:p>
          </table:table-cell>
        </table:table-row>
        <table:table-row table:style-name="ro1">
          <table:table-cell office:value-type="string" calcext:value-type="string">
            <text:p>sqlite3_file_control</text:p>
          </table:table-cell>
          <table:table-cell table:number-columns-repeated="3"/>
          <table:table-cell table:formula="of:=IFERROR(VLOOKUP([.A235]; [.$D$1:.$D$63]; 1; 0); &quot;&quot;)">
            <text:p/>
          </table:table-cell>
          <table:table-cell table:formula="of:=IF(ISERROR(MATCH([.A235]; [.$D$1:.$D$63]; 0)); [.A235]; &quot;&quot;)" office:value-type="string" office:string-value="sqlite3_file_control" calcext:value-type="string">
            <text:p>sqlite3_file_control</text:p>
          </table:table-cell>
        </table:table-row>
        <table:table-row table:style-name="ro1">
          <table:table-cell office:value-type="string" calcext:value-type="string">
            <text:p>sqlite3_test_control</text:p>
          </table:table-cell>
          <table:table-cell table:number-columns-repeated="3"/>
          <table:table-cell table:formula="of:=IFERROR(VLOOKUP([.A236]; [.$D$1:.$D$63]; 1; 0); &quot;&quot;)">
            <text:p/>
          </table:table-cell>
          <table:table-cell table:formula="of:=IF(ISERROR(MATCH([.A236]; [.$D$1:.$D$63]; 0)); [.A236]; &quot;&quot;)" office:value-type="string" office:string-value="sqlite3_test_control" calcext:value-type="string">
            <text:p>sqlite3_test_control</text:p>
          </table:table-cell>
        </table:table-row>
        <table:table-row table:style-name="ro1">
          <table:table-cell office:value-type="string" calcext:value-type="string">
            <text:p>sqlite3_keyword_count</text:p>
          </table:table-cell>
          <table:table-cell table:number-columns-repeated="3"/>
          <table:table-cell table:formula="of:=IFERROR(VLOOKUP([.A237]; [.$D$1:.$D$63]; 1; 0); &quot;&quot;)">
            <text:p/>
          </table:table-cell>
          <table:table-cell table:formula="of:=IF(ISERROR(MATCH([.A237]; [.$D$1:.$D$63]; 0)); [.A237]; &quot;&quot;)" office:value-type="string" office:string-value="sqlite3_keyword_count" calcext:value-type="string">
            <text:p>sqlite3_keyword_count</text:p>
          </table:table-cell>
        </table:table-row>
        <table:table-row table:style-name="ro1">
          <table:table-cell office:value-type="string" calcext:value-type="string">
            <text:p>sqlite3_keyword_name</text:p>
          </table:table-cell>
          <table:table-cell table:number-columns-repeated="3"/>
          <table:table-cell table:formula="of:=IFERROR(VLOOKUP([.A238]; [.$D$1:.$D$63]; 1; 0); &quot;&quot;)">
            <text:p/>
          </table:table-cell>
          <table:table-cell table:formula="of:=IF(ISERROR(MATCH([.A238]; [.$D$1:.$D$63]; 0)); [.A238]; &quot;&quot;)" office:value-type="string" office:string-value="sqlite3_keyword_name" calcext:value-type="string">
            <text:p>sqlite3_keyword_name</text:p>
          </table:table-cell>
        </table:table-row>
        <table:table-row table:style-name="ro1">
          <table:table-cell office:value-type="string" calcext:value-type="string">
            <text:p>sqlite3_keyword_check</text:p>
          </table:table-cell>
          <table:table-cell table:number-columns-repeated="3"/>
          <table:table-cell table:formula="of:=IFERROR(VLOOKUP([.A239]; [.$D$1:.$D$63]; 1; 0); &quot;&quot;)">
            <text:p/>
          </table:table-cell>
          <table:table-cell table:formula="of:=IF(ISERROR(MATCH([.A239]; [.$D$1:.$D$63]; 0)); [.A239]; &quot;&quot;)" office:value-type="string" office:string-value="sqlite3_keyword_check" calcext:value-type="string">
            <text:p>sqlite3_keyword_check</text:p>
          </table:table-cell>
        </table:table-row>
        <table:table-row table:style-name="ro1">
          <table:table-cell office:value-type="string" calcext:value-type="string">
            <text:p>sqlite3_str_new</text:p>
          </table:table-cell>
          <table:table-cell table:number-columns-repeated="3"/>
          <table:table-cell table:formula="of:=IFERROR(VLOOKUP([.A240]; [.$D$1:.$D$63]; 1; 0); &quot;&quot;)">
            <text:p/>
          </table:table-cell>
          <table:table-cell table:formula="of:=IF(ISERROR(MATCH([.A240]; [.$D$1:.$D$63]; 0)); [.A240]; &quot;&quot;)" office:value-type="string" office:string-value="sqlite3_str_new" calcext:value-type="string">
            <text:p>sqlite3_str_new</text:p>
          </table:table-cell>
        </table:table-row>
        <table:table-row table:style-name="ro1">
          <table:table-cell office:value-type="string" calcext:value-type="string">
            <text:p>sqlite3_str_finish</text:p>
          </table:table-cell>
          <table:table-cell table:number-columns-repeated="3"/>
          <table:table-cell table:formula="of:=IFERROR(VLOOKUP([.A241]; [.$D$1:.$D$63]; 1; 0); &quot;&quot;)">
            <text:p/>
          </table:table-cell>
          <table:table-cell table:formula="of:=IF(ISERROR(MATCH([.A241]; [.$D$1:.$D$63]; 0)); [.A241]; &quot;&quot;)" office:value-type="string" office:string-value="sqlite3_str_finish" calcext:value-type="string">
            <text:p>sqlite3_str_finish</text:p>
          </table:table-cell>
        </table:table-row>
        <table:table-row table:style-name="ro1">
          <table:table-cell office:value-type="string" calcext:value-type="string">
            <text:p>sqlite3_str_appendf</text:p>
          </table:table-cell>
          <table:table-cell table:number-columns-repeated="3"/>
          <table:table-cell table:formula="of:=IFERROR(VLOOKUP([.A242]; [.$D$1:.$D$63]; 1; 0); &quot;&quot;)">
            <text:p/>
          </table:table-cell>
          <table:table-cell table:formula="of:=IF(ISERROR(MATCH([.A242]; [.$D$1:.$D$63]; 0)); [.A242]; &quot;&quot;)" office:value-type="string" office:string-value="sqlite3_str_appendf" calcext:value-type="string">
            <text:p>sqlite3_str_appendf</text:p>
          </table:table-cell>
        </table:table-row>
        <table:table-row table:style-name="ro1">
          <table:table-cell office:value-type="string" calcext:value-type="string">
            <text:p>sqlite3_str_vappendf</text:p>
          </table:table-cell>
          <table:table-cell table:number-columns-repeated="3"/>
          <table:table-cell table:formula="of:=IFERROR(VLOOKUP([.A243]; [.$D$1:.$D$63]; 1; 0); &quot;&quot;)">
            <text:p/>
          </table:table-cell>
          <table:table-cell table:formula="of:=IF(ISERROR(MATCH([.A243]; [.$D$1:.$D$63]; 0)); [.A243]; &quot;&quot;)" office:value-type="string" office:string-value="sqlite3_str_vappendf" calcext:value-type="string">
            <text:p>sqlite3_str_vappendf</text:p>
          </table:table-cell>
        </table:table-row>
        <table:table-row table:style-name="ro1">
          <table:table-cell office:value-type="string" calcext:value-type="string">
            <text:p>sqlite3_str_append</text:p>
          </table:table-cell>
          <table:table-cell table:number-columns-repeated="3"/>
          <table:table-cell table:formula="of:=IFERROR(VLOOKUP([.A244]; [.$D$1:.$D$63]; 1; 0); &quot;&quot;)">
            <text:p/>
          </table:table-cell>
          <table:table-cell table:formula="of:=IF(ISERROR(MATCH([.A244]; [.$D$1:.$D$63]; 0)); [.A244]; &quot;&quot;)" office:value-type="string" office:string-value="sqlite3_str_append" calcext:value-type="string">
            <text:p>sqlite3_str_append</text:p>
          </table:table-cell>
        </table:table-row>
        <table:table-row table:style-name="ro1">
          <table:table-cell office:value-type="string" calcext:value-type="string">
            <text:p>sqlite3_str_appendall</text:p>
          </table:table-cell>
          <table:table-cell table:number-columns-repeated="3"/>
          <table:table-cell table:formula="of:=IFERROR(VLOOKUP([.A245]; [.$D$1:.$D$63]; 1; 0); &quot;&quot;)">
            <text:p/>
          </table:table-cell>
          <table:table-cell table:formula="of:=IF(ISERROR(MATCH([.A245]; [.$D$1:.$D$63]; 0)); [.A245]; &quot;&quot;)" office:value-type="string" office:string-value="sqlite3_str_appendall" calcext:value-type="string">
            <text:p>sqlite3_str_appendall</text:p>
          </table:table-cell>
        </table:table-row>
        <table:table-row table:style-name="ro1">
          <table:table-cell office:value-type="string" calcext:value-type="string">
            <text:p>sqlite3_str_appendchar</text:p>
          </table:table-cell>
          <table:table-cell table:number-columns-repeated="3"/>
          <table:table-cell table:formula="of:=IFERROR(VLOOKUP([.A246]; [.$D$1:.$D$63]; 1; 0); &quot;&quot;)">
            <text:p/>
          </table:table-cell>
          <table:table-cell table:formula="of:=IF(ISERROR(MATCH([.A246]; [.$D$1:.$D$63]; 0)); [.A246]; &quot;&quot;)" office:value-type="string" office:string-value="sqlite3_str_appendchar" calcext:value-type="string">
            <text:p>sqlite3_str_appendchar</text:p>
          </table:table-cell>
        </table:table-row>
        <table:table-row table:style-name="ro1">
          <table:table-cell office:value-type="string" calcext:value-type="string">
            <text:p>sqlite3_str_reset</text:p>
          </table:table-cell>
          <table:table-cell table:number-columns-repeated="3"/>
          <table:table-cell table:formula="of:=IFERROR(VLOOKUP([.A247]; [.$D$1:.$D$63]; 1; 0); &quot;&quot;)">
            <text:p/>
          </table:table-cell>
          <table:table-cell table:formula="of:=IF(ISERROR(MATCH([.A247]; [.$D$1:.$D$63]; 0)); [.A247]; &quot;&quot;)" office:value-type="string" office:string-value="sqlite3_str_reset" calcext:value-type="string">
            <text:p>sqlite3_str_reset</text:p>
          </table:table-cell>
        </table:table-row>
        <table:table-row table:style-name="ro1">
          <table:table-cell office:value-type="string" calcext:value-type="string">
            <text:p>sqlite3_str_errcode</text:p>
          </table:table-cell>
          <table:table-cell table:number-columns-repeated="3"/>
          <table:table-cell table:formula="of:=IFERROR(VLOOKUP([.A248]; [.$D$1:.$D$63]; 1; 0); &quot;&quot;)">
            <text:p/>
          </table:table-cell>
          <table:table-cell table:formula="of:=IF(ISERROR(MATCH([.A248]; [.$D$1:.$D$63]; 0)); [.A248]; &quot;&quot;)" office:value-type="string" office:string-value="sqlite3_str_errcode" calcext:value-type="string">
            <text:p>sqlite3_str_errcode</text:p>
          </table:table-cell>
        </table:table-row>
        <table:table-row table:style-name="ro1">
          <table:table-cell office:value-type="string" calcext:value-type="string">
            <text:p>sqlite3_str_length</text:p>
          </table:table-cell>
          <table:table-cell table:number-columns-repeated="3"/>
          <table:table-cell table:formula="of:=IFERROR(VLOOKUP([.A249]; [.$D$1:.$D$63]; 1; 0); &quot;&quot;)">
            <text:p/>
          </table:table-cell>
          <table:table-cell table:formula="of:=IF(ISERROR(MATCH([.A249]; [.$D$1:.$D$63]; 0)); [.A249]; &quot;&quot;)" office:value-type="string" office:string-value="sqlite3_str_length" calcext:value-type="string">
            <text:p>sqlite3_str_length</text:p>
          </table:table-cell>
        </table:table-row>
        <table:table-row table:style-name="ro1">
          <table:table-cell office:value-type="string" calcext:value-type="string">
            <text:p>sqlite3_str_value</text:p>
          </table:table-cell>
          <table:table-cell table:number-columns-repeated="3"/>
          <table:table-cell table:formula="of:=IFERROR(VLOOKUP([.A250]; [.$D$1:.$D$63]; 1; 0); &quot;&quot;)">
            <text:p/>
          </table:table-cell>
          <table:table-cell table:formula="of:=IF(ISERROR(MATCH([.A250]; [.$D$1:.$D$63]; 0)); [.A250]; &quot;&quot;)" office:value-type="string" office:string-value="sqlite3_str_value" calcext:value-type="string">
            <text:p>sqlite3_str_value</text:p>
          </table:table-cell>
        </table:table-row>
        <table:table-row table:style-name="ro1">
          <table:table-cell office:value-type="string" calcext:value-type="string">
            <text:p>sqlite3_status</text:p>
          </table:table-cell>
          <table:table-cell table:number-columns-repeated="3"/>
          <table:table-cell table:formula="of:=IFERROR(VLOOKUP([.A251]; [.$D$1:.$D$63]; 1; 0); &quot;&quot;)">
            <text:p/>
          </table:table-cell>
          <table:table-cell table:formula="of:=IF(ISERROR(MATCH([.A251]; [.$D$1:.$D$63]; 0)); [.A251]; &quot;&quot;)" office:value-type="string" office:string-value="sqlite3_status" calcext:value-type="string">
            <text:p>sqlite3_status</text:p>
          </table:table-cell>
        </table:table-row>
        <table:table-row table:style-name="ro1">
          <table:table-cell office:value-type="string" calcext:value-type="string">
            <text:p>sqlite3_status64</text:p>
          </table:table-cell>
          <table:table-cell table:number-columns-repeated="3"/>
          <table:table-cell table:formula="of:=IFERROR(VLOOKUP([.A252]; [.$D$1:.$D$63]; 1; 0); &quot;&quot;)">
            <text:p/>
          </table:table-cell>
          <table:table-cell table:formula="of:=IF(ISERROR(MATCH([.A252]; [.$D$1:.$D$63]; 0)); [.A252]; &quot;&quot;)" office:value-type="string" office:string-value="sqlite3_status64" calcext:value-type="string">
            <text:p>sqlite3_status64</text:p>
          </table:table-cell>
        </table:table-row>
        <table:table-row table:style-name="ro1">
          <table:table-cell office:value-type="string" calcext:value-type="string">
            <text:p>sqlite3_db_status</text:p>
          </table:table-cell>
          <table:table-cell table:number-columns-repeated="3"/>
          <table:table-cell table:formula="of:=IFERROR(VLOOKUP([.A253]; [.$D$1:.$D$63]; 1; 0); &quot;&quot;)">
            <text:p/>
          </table:table-cell>
          <table:table-cell table:formula="of:=IF(ISERROR(MATCH([.A253]; [.$D$1:.$D$63]; 0)); [.A253]; &quot;&quot;)" office:value-type="string" office:string-value="sqlite3_db_status" calcext:value-type="string">
            <text:p>sqlite3_db_status</text:p>
          </table:table-cell>
        </table:table-row>
        <table:table-row table:style-name="ro1">
          <table:table-cell office:value-type="string" calcext:value-type="string">
            <text:p>sqlite3_stmt_status</text:p>
          </table:table-cell>
          <table:table-cell table:number-columns-repeated="3"/>
          <table:table-cell table:formula="of:=IFERROR(VLOOKUP([.A254]; [.$D$1:.$D$63]; 1; 0); &quot;&quot;)">
            <text:p/>
          </table:table-cell>
          <table:table-cell table:formula="of:=IF(ISERROR(MATCH([.A254]; [.$D$1:.$D$63]; 0)); [.A254]; &quot;&quot;)" office:value-type="string" office:string-value="sqlite3_stmt_status" calcext:value-type="string">
            <text:p>sqlite3_stmt_status</text:p>
          </table:table-cell>
        </table:table-row>
        <table:table-row table:style-name="ro1">
          <table:table-cell office:value-type="string" calcext:value-type="string">
            <text:p>sqlite3_backup_init</text:p>
          </table:table-cell>
          <table:table-cell table:number-columns-repeated="3"/>
          <table:table-cell table:formula="of:=IFERROR(VLOOKUP([.A255]; [.$D$1:.$D$63]; 1; 0); &quot;&quot;)" office:value-type="string" office:string-value="sqlite3_backup_init" calcext:value-type="string">
            <text:p>sqlite3_backup_init</text:p>
          </table:table-cell>
          <table:table-cell table:formula="of:=IF(ISERROR(MATCH([.A255]; [.$D$1:.$D$63]; 0)); [.A255]; &quot;&quot;)">
            <text:p/>
          </table:table-cell>
        </table:table-row>
        <table:table-row table:style-name="ro1">
          <table:table-cell office:value-type="string" calcext:value-type="string">
            <text:p>sqlite3_backup_step</text:p>
          </table:table-cell>
          <table:table-cell table:number-columns-repeated="3"/>
          <table:table-cell table:formula="of:=IFERROR(VLOOKUP([.A256]; [.$D$1:.$D$63]; 1; 0); &quot;&quot;)" office:value-type="string" office:string-value="sqlite3_backup_step" calcext:value-type="string">
            <text:p>sqlite3_backup_step</text:p>
          </table:table-cell>
          <table:table-cell table:formula="of:=IF(ISERROR(MATCH([.A256]; [.$D$1:.$D$63]; 0)); [.A256]; &quot;&quot;)">
            <text:p/>
          </table:table-cell>
        </table:table-row>
        <table:table-row table:style-name="ro1">
          <table:table-cell office:value-type="string" calcext:value-type="string">
            <text:p>sqlite3_backup_finish</text:p>
          </table:table-cell>
          <table:table-cell table:number-columns-repeated="3"/>
          <table:table-cell table:formula="of:=IFERROR(VLOOKUP([.A257]; [.$D$1:.$D$63]; 1; 0); &quot;&quot;)" office:value-type="string" office:string-value="sqlite3_backup_finish" calcext:value-type="string">
            <text:p>sqlite3_backup_finish</text:p>
          </table:table-cell>
          <table:table-cell table:formula="of:=IF(ISERROR(MATCH([.A257]; [.$D$1:.$D$63]; 0)); [.A257]; &quot;&quot;)">
            <text:p/>
          </table:table-cell>
        </table:table-row>
        <table:table-row table:style-name="ro1">
          <table:table-cell office:value-type="string" calcext:value-type="string">
            <text:p>sqlite3_backup_remaining</text:p>
          </table:table-cell>
          <table:table-cell table:number-columns-repeated="3"/>
          <table:table-cell table:formula="of:=IFERROR(VLOOKUP([.A258]; [.$D$1:.$D$63]; 1; 0); &quot;&quot;)" office:value-type="string" office:string-value="sqlite3_backup_remaining" calcext:value-type="string">
            <text:p>sqlite3_backup_remaining</text:p>
          </table:table-cell>
          <table:table-cell table:formula="of:=IF(ISERROR(MATCH([.A258]; [.$D$1:.$D$63]; 0)); [.A258]; &quot;&quot;)">
            <text:p/>
          </table:table-cell>
        </table:table-row>
        <table:table-row table:style-name="ro1">
          <table:table-cell office:value-type="string" calcext:value-type="string">
            <text:p>sqlite3_backup_pagecount</text:p>
          </table:table-cell>
          <table:table-cell table:number-columns-repeated="3"/>
          <table:table-cell table:formula="of:=IFERROR(VLOOKUP([.A259]; [.$D$1:.$D$63]; 1; 0); &quot;&quot;)" office:value-type="string" office:string-value="sqlite3_backup_pagecount" calcext:value-type="string">
            <text:p>sqlite3_backup_pagecount</text:p>
          </table:table-cell>
          <table:table-cell table:formula="of:=IF(ISERROR(MATCH([.A259]; [.$D$1:.$D$63]; 0)); [.A259]; &quot;&quot;)">
            <text:p/>
          </table:table-cell>
        </table:table-row>
        <table:table-row table:style-name="ro1">
          <table:table-cell office:value-type="string" calcext:value-type="string">
            <text:p>sqlite3_unlock_notify</text:p>
          </table:table-cell>
          <table:table-cell table:number-columns-repeated="3"/>
          <table:table-cell table:formula="of:=IFERROR(VLOOKUP([.A260]; [.$D$1:.$D$63]; 1; 0); &quot;&quot;)">
            <text:p/>
          </table:table-cell>
          <table:table-cell table:formula="of:=IF(ISERROR(MATCH([.A260]; [.$D$1:.$D$63]; 0)); [.A260]; &quot;&quot;)" office:value-type="string" office:string-value="sqlite3_unlock_notify" calcext:value-type="string">
            <text:p>sqlite3_unlock_notify</text:p>
          </table:table-cell>
        </table:table-row>
        <table:table-row table:style-name="ro1">
          <table:table-cell office:value-type="string" calcext:value-type="string">
            <text:p>sqlite3_stricmp</text:p>
          </table:table-cell>
          <table:table-cell table:number-columns-repeated="3"/>
          <table:table-cell table:formula="of:=IFERROR(VLOOKUP([.A261]; [.$D$1:.$D$63]; 1; 0); &quot;&quot;)">
            <text:p/>
          </table:table-cell>
          <table:table-cell table:formula="of:=IF(ISERROR(MATCH([.A261]; [.$D$1:.$D$63]; 0)); [.A261]; &quot;&quot;)" office:value-type="string" office:string-value="sqlite3_stricmp" calcext:value-type="string">
            <text:p>sqlite3_stricmp</text:p>
          </table:table-cell>
        </table:table-row>
        <table:table-row table:style-name="ro1">
          <table:table-cell office:value-type="string" calcext:value-type="string">
            <text:p>sqlite3_strnicmp</text:p>
          </table:table-cell>
          <table:table-cell table:number-columns-repeated="3"/>
          <table:table-cell table:formula="of:=IFERROR(VLOOKUP([.A262]; [.$D$1:.$D$63]; 1; 0); &quot;&quot;)">
            <text:p/>
          </table:table-cell>
          <table:table-cell table:formula="of:=IF(ISERROR(MATCH([.A262]; [.$D$1:.$D$63]; 0)); [.A262]; &quot;&quot;)" office:value-type="string" office:string-value="sqlite3_strnicmp" calcext:value-type="string">
            <text:p>sqlite3_strnicmp</text:p>
          </table:table-cell>
        </table:table-row>
        <table:table-row table:style-name="ro1">
          <table:table-cell office:value-type="string" calcext:value-type="string">
            <text:p>sqlite3_strglob</text:p>
          </table:table-cell>
          <table:table-cell table:number-columns-repeated="3"/>
          <table:table-cell table:formula="of:=IFERROR(VLOOKUP([.A263]; [.$D$1:.$D$63]; 1; 0); &quot;&quot;)">
            <text:p/>
          </table:table-cell>
          <table:table-cell table:formula="of:=IF(ISERROR(MATCH([.A263]; [.$D$1:.$D$63]; 0)); [.A263]; &quot;&quot;)" office:value-type="string" office:string-value="sqlite3_strglob" calcext:value-type="string">
            <text:p>sqlite3_strglob</text:p>
          </table:table-cell>
        </table:table-row>
        <table:table-row table:style-name="ro1">
          <table:table-cell office:value-type="string" calcext:value-type="string">
            <text:p>sqlite3_strlike</text:p>
          </table:table-cell>
          <table:table-cell table:number-columns-repeated="3"/>
          <table:table-cell table:formula="of:=IFERROR(VLOOKUP([.A264]; [.$D$1:.$D$63]; 1; 0); &quot;&quot;)">
            <text:p/>
          </table:table-cell>
          <table:table-cell table:formula="of:=IF(ISERROR(MATCH([.A264]; [.$D$1:.$D$63]; 0)); [.A264]; &quot;&quot;)" office:value-type="string" office:string-value="sqlite3_strlike" calcext:value-type="string">
            <text:p>sqlite3_strlike</text:p>
          </table:table-cell>
        </table:table-row>
        <table:table-row table:style-name="ro1">
          <table:table-cell office:value-type="string" calcext:value-type="string">
            <text:p>sqlite3_log</text:p>
          </table:table-cell>
          <table:table-cell table:number-columns-repeated="3"/>
          <table:table-cell table:formula="of:=IFERROR(VLOOKUP([.A265]; [.$D$1:.$D$63]; 1; 0); &quot;&quot;)">
            <text:p/>
          </table:table-cell>
          <table:table-cell table:formula="of:=IF(ISERROR(MATCH([.A265]; [.$D$1:.$D$63]; 0)); [.A265]; &quot;&quot;)" office:value-type="string" office:string-value="sqlite3_log" calcext:value-type="string">
            <text:p>sqlite3_log</text:p>
          </table:table-cell>
        </table:table-row>
        <table:table-row table:style-name="ro1">
          <table:table-cell office:value-type="string" calcext:value-type="string">
            <text:p>sqlite3_wal_hook</text:p>
          </table:table-cell>
          <table:table-cell table:number-columns-repeated="3"/>
          <table:table-cell table:formula="of:=IFERROR(VLOOKUP([.A266]; [.$D$1:.$D$63]; 1; 0); &quot;&quot;)">
            <text:p/>
          </table:table-cell>
          <table:table-cell table:formula="of:=IF(ISERROR(MATCH([.A266]; [.$D$1:.$D$63]; 0)); [.A266]; &quot;&quot;)" office:value-type="string" office:string-value="sqlite3_wal_hook" calcext:value-type="string">
            <text:p>sqlite3_wal_hook</text:p>
          </table:table-cell>
        </table:table-row>
        <table:table-row table:style-name="ro1">
          <table:table-cell office:value-type="string" calcext:value-type="string">
            <text:p>sqlite3_wal_autocheckpoint</text:p>
          </table:table-cell>
          <table:table-cell table:number-columns-repeated="3"/>
          <table:table-cell table:formula="of:=IFERROR(VLOOKUP([.A267]; [.$D$1:.$D$63]; 1; 0); &quot;&quot;)">
            <text:p/>
          </table:table-cell>
          <table:table-cell table:formula="of:=IF(ISERROR(MATCH([.A267]; [.$D$1:.$D$63]; 0)); [.A267]; &quot;&quot;)" office:value-type="string" office:string-value="sqlite3_wal_autocheckpoint" calcext:value-type="string">
            <text:p>sqlite3_wal_autocheckpoint</text:p>
          </table:table-cell>
        </table:table-row>
        <table:table-row table:style-name="ro1">
          <table:table-cell office:value-type="string" calcext:value-type="string">
            <text:p>sqlite3_wal_checkpoint</text:p>
          </table:table-cell>
          <table:table-cell table:number-columns-repeated="3"/>
          <table:table-cell table:formula="of:=IFERROR(VLOOKUP([.A268]; [.$D$1:.$D$63]; 1; 0); &quot;&quot;)">
            <text:p/>
          </table:table-cell>
          <table:table-cell table:formula="of:=IF(ISERROR(MATCH([.A268]; [.$D$1:.$D$63]; 0)); [.A268]; &quot;&quot;)" office:value-type="string" office:string-value="sqlite3_wal_checkpoint" calcext:value-type="string">
            <text:p>sqlite3_wal_checkpoint</text:p>
          </table:table-cell>
        </table:table-row>
        <table:table-row table:style-name="ro1">
          <table:table-cell office:value-type="string" calcext:value-type="string">
            <text:p>sqlite3_wal_checkpoint_v2</text:p>
          </table:table-cell>
          <table:table-cell table:number-columns-repeated="3"/>
          <table:table-cell table:formula="of:=IFERROR(VLOOKUP([.A269]; [.$D$1:.$D$63]; 1; 0); &quot;&quot;)">
            <text:p/>
          </table:table-cell>
          <table:table-cell table:formula="of:=IF(ISERROR(MATCH([.A269]; [.$D$1:.$D$63]; 0)); [.A269]; &quot;&quot;)" office:value-type="string" office:string-value="sqlite3_wal_checkpoint_v2" calcext:value-type="string">
            <text:p>sqlite3_wal_checkpoint_v2</text:p>
          </table:table-cell>
        </table:table-row>
        <table:table-row table:style-name="ro1">
          <table:table-cell office:value-type="string" calcext:value-type="string">
            <text:p>sqlite3_vtab_config</text:p>
          </table:table-cell>
          <table:table-cell table:number-columns-repeated="3"/>
          <table:table-cell table:formula="of:=IFERROR(VLOOKUP([.A270]; [.$D$1:.$D$63]; 1; 0); &quot;&quot;)">
            <text:p/>
          </table:table-cell>
          <table:table-cell table:formula="of:=IF(ISERROR(MATCH([.A270]; [.$D$1:.$D$63]; 0)); [.A270]; &quot;&quot;)" office:value-type="string" office:string-value="sqlite3_vtab_config" calcext:value-type="string">
            <text:p>sqlite3_vtab_config</text:p>
          </table:table-cell>
        </table:table-row>
        <table:table-row table:style-name="ro1">
          <table:table-cell office:value-type="string" calcext:value-type="string">
            <text:p>sqlite3_vtab_on_conflict</text:p>
          </table:table-cell>
          <table:table-cell table:number-columns-repeated="3"/>
          <table:table-cell table:formula="of:=IFERROR(VLOOKUP([.A271]; [.$D$1:.$D$63]; 1; 0); &quot;&quot;)">
            <text:p/>
          </table:table-cell>
          <table:table-cell table:formula="of:=IF(ISERROR(MATCH([.A271]; [.$D$1:.$D$63]; 0)); [.A271]; &quot;&quot;)" office:value-type="string" office:string-value="sqlite3_vtab_on_conflict" calcext:value-type="string">
            <text:p>sqlite3_vtab_on_conflict</text:p>
          </table:table-cell>
        </table:table-row>
        <table:table-row table:style-name="ro1">
          <table:table-cell office:value-type="string" calcext:value-type="string">
            <text:p>sqlite3_vtab_nochange</text:p>
          </table:table-cell>
          <table:table-cell table:number-columns-repeated="3"/>
          <table:table-cell table:formula="of:=IFERROR(VLOOKUP([.A272]; [.$D$1:.$D$63]; 1; 0); &quot;&quot;)">
            <text:p/>
          </table:table-cell>
          <table:table-cell table:formula="of:=IF(ISERROR(MATCH([.A272]; [.$D$1:.$D$63]; 0)); [.A272]; &quot;&quot;)" office:value-type="string" office:string-value="sqlite3_vtab_nochange" calcext:value-type="string">
            <text:p>sqlite3_vtab_nochange</text:p>
          </table:table-cell>
        </table:table-row>
        <table:table-row table:style-name="ro1">
          <table:table-cell office:value-type="string" calcext:value-type="string">
            <text:p>sqlite3_vtab_collation</text:p>
          </table:table-cell>
          <table:table-cell table:number-columns-repeated="3"/>
          <table:table-cell table:formula="of:=IFERROR(VLOOKUP([.A273]; [.$D$1:.$D$63]; 1; 0); &quot;&quot;)">
            <text:p/>
          </table:table-cell>
          <table:table-cell table:formula="of:=IF(ISERROR(MATCH([.A273]; [.$D$1:.$D$63]; 0)); [.A273]; &quot;&quot;)" office:value-type="string" office:string-value="sqlite3_vtab_collation" calcext:value-type="string">
            <text:p>sqlite3_vtab_collation</text:p>
          </table:table-cell>
        </table:table-row>
        <table:table-row table:style-name="ro1">
          <table:table-cell office:value-type="string" calcext:value-type="string">
            <text:p>sqlite3_vtab_distinct</text:p>
          </table:table-cell>
          <table:table-cell table:number-columns-repeated="3"/>
          <table:table-cell table:formula="of:=IFERROR(VLOOKUP([.A274]; [.$D$1:.$D$63]; 1; 0); &quot;&quot;)">
            <text:p/>
          </table:table-cell>
          <table:table-cell table:formula="of:=IF(ISERROR(MATCH([.A274]; [.$D$1:.$D$63]; 0)); [.A274]; &quot;&quot;)" office:value-type="string" office:string-value="sqlite3_vtab_distinct" calcext:value-type="string">
            <text:p>sqlite3_vtab_distinct</text:p>
          </table:table-cell>
        </table:table-row>
        <table:table-row table:style-name="ro1">
          <table:table-cell office:value-type="string" calcext:value-type="string">
            <text:p>sqlite3_vtab_in</text:p>
          </table:table-cell>
          <table:table-cell table:number-columns-repeated="3"/>
          <table:table-cell table:formula="of:=IFERROR(VLOOKUP([.A275]; [.$D$1:.$D$63]; 1; 0); &quot;&quot;)">
            <text:p/>
          </table:table-cell>
          <table:table-cell table:formula="of:=IF(ISERROR(MATCH([.A275]; [.$D$1:.$D$63]; 0)); [.A275]; &quot;&quot;)" office:value-type="string" office:string-value="sqlite3_vtab_in" calcext:value-type="string">
            <text:p>sqlite3_vtab_in</text:p>
          </table:table-cell>
        </table:table-row>
        <table:table-row table:style-name="ro1">
          <table:table-cell office:value-type="string" calcext:value-type="string">
            <text:p>sqlite3_vtab_in_first</text:p>
          </table:table-cell>
          <table:table-cell table:number-columns-repeated="3"/>
          <table:table-cell table:formula="of:=IFERROR(VLOOKUP([.A276]; [.$D$1:.$D$63]; 1; 0); &quot;&quot;)">
            <text:p/>
          </table:table-cell>
          <table:table-cell table:formula="of:=IF(ISERROR(MATCH([.A276]; [.$D$1:.$D$63]; 0)); [.A276]; &quot;&quot;)" office:value-type="string" office:string-value="sqlite3_vtab_in_first" calcext:value-type="string">
            <text:p>sqlite3_vtab_in_first</text:p>
          </table:table-cell>
        </table:table-row>
        <table:table-row table:style-name="ro1">
          <table:table-cell office:value-type="string" calcext:value-type="string">
            <text:p>sqlite3_vtab_in_next</text:p>
          </table:table-cell>
          <table:table-cell table:number-columns-repeated="3"/>
          <table:table-cell table:formula="of:=IFERROR(VLOOKUP([.A277]; [.$D$1:.$D$63]; 1; 0); &quot;&quot;)">
            <text:p/>
          </table:table-cell>
          <table:table-cell table:formula="of:=IF(ISERROR(MATCH([.A277]; [.$D$1:.$D$63]; 0)); [.A277]; &quot;&quot;)" office:value-type="string" office:string-value="sqlite3_vtab_in_next" calcext:value-type="string">
            <text:p>sqlite3_vtab_in_next</text:p>
          </table:table-cell>
        </table:table-row>
        <table:table-row table:style-name="ro1">
          <table:table-cell office:value-type="string" calcext:value-type="string">
            <text:p>sqlite3_vtab_rhs_value</text:p>
          </table:table-cell>
          <table:table-cell table:number-columns-repeated="3"/>
          <table:table-cell table:formula="of:=IFERROR(VLOOKUP([.A278]; [.$D$1:.$D$63]; 1; 0); &quot;&quot;)">
            <text:p/>
          </table:table-cell>
          <table:table-cell table:formula="of:=IF(ISERROR(MATCH([.A278]; [.$D$1:.$D$63]; 0)); [.A278]; &quot;&quot;)" office:value-type="string" office:string-value="sqlite3_vtab_rhs_value" calcext:value-type="string">
            <text:p>sqlite3_vtab_rhs_value</text:p>
          </table:table-cell>
        </table:table-row>
        <table:table-row table:style-name="ro1">
          <table:table-cell office:value-type="string" calcext:value-type="string">
            <text:p>sqlite3_stmt_scanstatus</text:p>
          </table:table-cell>
          <table:table-cell table:number-columns-repeated="3"/>
          <table:table-cell table:formula="of:=IFERROR(VLOOKUP([.A279]; [.$D$1:.$D$63]; 1; 0); &quot;&quot;)">
            <text:p/>
          </table:table-cell>
          <table:table-cell table:formula="of:=IF(ISERROR(MATCH([.A279]; [.$D$1:.$D$63]; 0)); [.A279]; &quot;&quot;)" office:value-type="string" office:string-value="sqlite3_stmt_scanstatus" calcext:value-type="string">
            <text:p>sqlite3_stmt_scanstatus</text:p>
          </table:table-cell>
        </table:table-row>
        <table:table-row table:style-name="ro1">
          <table:table-cell office:value-type="string" calcext:value-type="string">
            <text:p>sqlite3_stmt_scanstatus_v2</text:p>
          </table:table-cell>
          <table:table-cell table:number-columns-repeated="3"/>
          <table:table-cell table:formula="of:=IFERROR(VLOOKUP([.A280]; [.$D$1:.$D$63]; 1; 0); &quot;&quot;)">
            <text:p/>
          </table:table-cell>
          <table:table-cell table:formula="of:=IF(ISERROR(MATCH([.A280]; [.$D$1:.$D$63]; 0)); [.A280]; &quot;&quot;)" office:value-type="string" office:string-value="sqlite3_stmt_scanstatus_v2" calcext:value-type="string">
            <text:p>sqlite3_stmt_scanstatus_v2</text:p>
          </table:table-cell>
        </table:table-row>
        <table:table-row table:style-name="ro1">
          <table:table-cell office:value-type="string" calcext:value-type="string">
            <text:p>sqlite3_stmt_scanstatus_reset</text:p>
          </table:table-cell>
          <table:table-cell table:number-columns-repeated="3"/>
          <table:table-cell table:formula="of:=IFERROR(VLOOKUP([.A281]; [.$D$1:.$D$63]; 1; 0); &quot;&quot;)">
            <text:p/>
          </table:table-cell>
          <table:table-cell table:formula="of:=IF(ISERROR(MATCH([.A281]; [.$D$1:.$D$63]; 0)); [.A281]; &quot;&quot;)" office:value-type="string" office:string-value="sqlite3_stmt_scanstatus_reset" calcext:value-type="string">
            <text:p>sqlite3_stmt_scanstatus_reset</text:p>
          </table:table-cell>
        </table:table-row>
        <table:table-row table:style-name="ro1">
          <table:table-cell office:value-type="string" calcext:value-type="string">
            <text:p>sqlite3_db_cacheflush</text:p>
          </table:table-cell>
          <table:table-cell table:number-columns-repeated="3"/>
          <table:table-cell table:formula="of:=IFERROR(VLOOKUP([.A282]; [.$D$1:.$D$63]; 1; 0); &quot;&quot;)">
            <text:p/>
          </table:table-cell>
          <table:table-cell table:formula="of:=IF(ISERROR(MATCH([.A282]; [.$D$1:.$D$63]; 0)); [.A282]; &quot;&quot;)" office:value-type="string" office:string-value="sqlite3_db_cacheflush" calcext:value-type="string">
            <text:p>sqlite3_db_cacheflush</text:p>
          </table:table-cell>
        </table:table-row>
        <table:table-row table:style-name="ro1">
          <table:table-cell office:value-type="string" calcext:value-type="string">
            <text:p>sqlite3_system_errno</text:p>
          </table:table-cell>
          <table:table-cell table:number-columns-repeated="3"/>
          <table:table-cell table:formula="of:=IFERROR(VLOOKUP([.A283]; [.$D$1:.$D$63]; 1; 0); &quot;&quot;)">
            <text:p/>
          </table:table-cell>
          <table:table-cell table:formula="of:=IF(ISERROR(MATCH([.A283]; [.$D$1:.$D$63]; 0)); [.A283]; &quot;&quot;)" office:value-type="string" office:string-value="sqlite3_system_errno" calcext:value-type="string">
            <text:p>sqlite3_system_errno</text:p>
          </table:table-cell>
        </table:table-row>
        <table:table-row table:style-name="ro1">
          <table:table-cell office:value-type="string" calcext:value-type="string">
            <text:p>sqlite3_snapshot_get</text:p>
          </table:table-cell>
          <table:table-cell table:number-columns-repeated="3"/>
          <table:table-cell table:formula="of:=IFERROR(VLOOKUP([.A284]; [.$D$1:.$D$63]; 1; 0); &quot;&quot;)">
            <text:p/>
          </table:table-cell>
          <table:table-cell table:formula="of:=IF(ISERROR(MATCH([.A284]; [.$D$1:.$D$63]; 0)); [.A284]; &quot;&quot;)" office:value-type="string" office:string-value="sqlite3_snapshot_get" calcext:value-type="string">
            <text:p>sqlite3_snapshot_get</text:p>
          </table:table-cell>
        </table:table-row>
        <table:table-row table:style-name="ro1">
          <table:table-cell office:value-type="string" calcext:value-type="string">
            <text:p>sqlite3_snapshot_open</text:p>
          </table:table-cell>
          <table:table-cell table:number-columns-repeated="3"/>
          <table:table-cell table:formula="of:=IFERROR(VLOOKUP([.A285]; [.$D$1:.$D$63]; 1; 0); &quot;&quot;)">
            <text:p/>
          </table:table-cell>
          <table:table-cell table:formula="of:=IF(ISERROR(MATCH([.A285]; [.$D$1:.$D$63]; 0)); [.A285]; &quot;&quot;)" office:value-type="string" office:string-value="sqlite3_snapshot_open" calcext:value-type="string">
            <text:p>sqlite3_snapshot_open</text:p>
          </table:table-cell>
        </table:table-row>
        <table:table-row table:style-name="ro1">
          <table:table-cell office:value-type="string" calcext:value-type="string">
            <text:p>sqlite3_snapshot_free</text:p>
          </table:table-cell>
          <table:table-cell table:number-columns-repeated="3"/>
          <table:table-cell table:formula="of:=IFERROR(VLOOKUP([.A286]; [.$D$1:.$D$63]; 1; 0); &quot;&quot;)">
            <text:p/>
          </table:table-cell>
          <table:table-cell table:formula="of:=IF(ISERROR(MATCH([.A286]; [.$D$1:.$D$63]; 0)); [.A286]; &quot;&quot;)" office:value-type="string" office:string-value="sqlite3_snapshot_free" calcext:value-type="string">
            <text:p>sqlite3_snapshot_free</text:p>
          </table:table-cell>
        </table:table-row>
        <table:table-row table:style-name="ro1">
          <table:table-cell office:value-type="string" calcext:value-type="string">
            <text:p>sqlite3_snapshot_cmp</text:p>
          </table:table-cell>
          <table:table-cell table:number-columns-repeated="3"/>
          <table:table-cell table:formula="of:=IFERROR(VLOOKUP([.A287]; [.$D$1:.$D$63]; 1; 0); &quot;&quot;)">
            <text:p/>
          </table:table-cell>
          <table:table-cell table:formula="of:=IF(ISERROR(MATCH([.A287]; [.$D$1:.$D$63]; 0)); [.A287]; &quot;&quot;)" office:value-type="string" office:string-value="sqlite3_snapshot_cmp" calcext:value-type="string">
            <text:p>sqlite3_snapshot_cmp</text:p>
          </table:table-cell>
        </table:table-row>
        <table:table-row table:style-name="ro1">
          <table:table-cell office:value-type="string" calcext:value-type="string">
            <text:p>sqlite3_snapshot_recover</text:p>
          </table:table-cell>
          <table:table-cell table:number-columns-repeated="3"/>
          <table:table-cell table:formula="of:=IFERROR(VLOOKUP([.A288]; [.$D$1:.$D$63]; 1; 0); &quot;&quot;)">
            <text:p/>
          </table:table-cell>
          <table:table-cell table:formula="of:=IF(ISERROR(MATCH([.A288]; [.$D$1:.$D$63]; 0)); [.A288]; &quot;&quot;)" office:value-type="string" office:string-value="sqlite3_snapshot_recover" calcext:value-type="string">
            <text:p>sqlite3_snapshot_recover</text:p>
          </table:table-cell>
        </table:table-row>
        <table:table-row table:style-name="ro1">
          <table:table-cell office:value-type="string" calcext:value-type="string">
            <text:p>sqlite3_serialize</text:p>
          </table:table-cell>
          <table:table-cell table:number-columns-repeated="3"/>
          <table:table-cell table:formula="of:=IFERROR(VLOOKUP([.A289]; [.$D$1:.$D$63]; 1; 0); &quot;&quot;)">
            <text:p/>
          </table:table-cell>
          <table:table-cell table:formula="of:=IF(ISERROR(MATCH([.A289]; [.$D$1:.$D$63]; 0)); [.A289]; &quot;&quot;)" office:value-type="string" office:string-value="sqlite3_serialize" calcext:value-type="string">
            <text:p>sqlite3_serialize</text:p>
          </table:table-cell>
        </table:table-row>
        <table:table-row table:style-name="ro1">
          <table:table-cell office:value-type="string" calcext:value-type="string">
            <text:p>sqlite3_deserialize</text:p>
          </table:table-cell>
          <table:table-cell table:number-columns-repeated="3"/>
          <table:table-cell table:formula="of:=IFERROR(VLOOKUP([.A290]; [.$D$1:.$D$63]; 1; 0); &quot;&quot;)">
            <text:p/>
          </table:table-cell>
          <table:table-cell table:formula="of:=IF(ISERROR(MATCH([.A290]; [.$D$1:.$D$63]; 0)); [.A290]; &quot;&quot;)" office:value-type="string" office:string-value="sqlite3_deserialize" calcext:value-type="string">
            <text:p>sqlite3_deserialize</text:p>
          </table:table-cell>
        </table:table-row>
        <table:table-row table:style-name="ro1">
          <table:table-cell office:value-type="string" calcext:value-type="string">
            <text:p>sqlite3_rtree_geometry_callback</text:p>
          </table:table-cell>
          <table:table-cell table:number-columns-repeated="3"/>
          <table:table-cell table:formula="of:=IFERROR(VLOOKUP([.A291]; [.$D$1:.$D$63]; 1; 0); &quot;&quot;)">
            <text:p/>
          </table:table-cell>
          <table:table-cell table:formula="of:=IF(ISERROR(MATCH([.A291]; [.$D$1:.$D$63]; 0)); [.A291]; &quot;&quot;)" office:value-type="string" office:string-value="sqlite3_rtree_geometry_callback" calcext:value-type="string">
            <text:p>sqlite3_rtree_geometry_callback</text:p>
          </table:table-cell>
        </table:table-row>
        <table:table-row table:style-name="ro1">
          <table:table-cell office:value-type="string" calcext:value-type="string">
            <text:p>sqlite3_rtree_query_callback</text:p>
          </table:table-cell>
          <table:table-cell table:number-columns-repeated="3"/>
          <table:table-cell table:formula="of:=IFERROR(VLOOKUP([.A292]; [.$D$1:.$D$63]; 1; 0); &quot;&quot;)">
            <text:p/>
          </table:table-cell>
          <table:table-cell table:formula="of:=IF(ISERROR(MATCH([.A292]; [.$D$1:.$D$63]; 0)); [.A292]; &quot;&quot;)" office:value-type="string" office:string-value="sqlite3_rtree_query_callback" calcext:value-type="string">
            <text:p>sqlite3_rtree_query_callba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5T15:58:53.980422200</meta:creation-date>
    <dc:date>2026-07-15T17:03:24.537231400</dc:date>
    <meta:editing-duration>PT1H4M45S</meta:editing-duration>
    <meta:editing-cycles>6</meta:editing-cycles>
    <meta:generator>LibreOffice/25.8.7.1$Windows_X86_64 LibreOffice_project/39c3b7ac021cfb9f4ca681457ad36828f90e2ce7</meta:generator>
    <meta:document-statistic meta:table-count="1" meta:cell-count="939" meta:object-count="0"/>
  </office:meta>
</office:document-meta>
</file>